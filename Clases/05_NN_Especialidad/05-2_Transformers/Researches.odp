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80000034CE94C7395B2D58CA4.png" manifest:media-type="image/png"/>
  <manifest:file-entry manifest:full-path="Pictures/10000000000005B7000002D4F2B864672D21CEF7.png" manifest:media-type="image/png"/>
  <manifest:file-entry manifest:full-path="Pictures/10000000000002C5000001A6761E442EC066A45A.png" manifest:media-type="image/png"/>
  <manifest:file-entry manifest:full-path="Pictures/10000000000001FB0000028502A6B491629C498B.png" manifest:media-type="image/png"/>
  <manifest:file-entry manifest:full-path="Pictures/100000000000040000000300F4B7E6DF4A8D52A6.jpg" manifest:media-type="image/jpeg"/>
  <manifest:file-entry manifest:full-path="Pictures/1000000000000454000001FCB32BB344EA6D612F.png" manifest:media-type="image/png"/>
  <manifest:file-entry manifest:full-path="Pictures/100000000000036B00000252BC92EDE32AE05D24.png" manifest:media-type="image/png"/>
  <manifest:file-entry manifest:full-path="Pictures/1000000000000424000002C8AB57256B925855DC.png" manifest:media-type="image/png"/>
  <manifest:file-entry manifest:full-path="Pictures/10000000000005EE0000033D1365D12CC18A73CC.png" manifest:media-type="image/png"/>
  <manifest:file-entry manifest:full-path="Pictures/100000000000036B000001FA4E64BBAA9D54B913.png" manifest:media-type="image/png"/>
  <manifest:file-entry manifest:full-path="Pictures/100000000000044F000001797E4D0F664E1B6A37.png" manifest:media-type="image/png"/>
  <manifest:file-entry manifest:full-path="Pictures/10000000000004DB00000181CA3F9E9D3DAC2157.png" manifest:media-type="image/png"/>
  <manifest:file-entry manifest:full-path="Pictures/10000001000003250000005FEF8F71999550046A.png" manifest:media-type="image/png"/>
  <manifest:file-entry manifest:full-path="Pictures/100000010000033F0000017A74B0CF8018E8E555.png" manifest:media-type="image/png"/>
  <manifest:file-entry manifest:full-path="Pictures/100000000000025D0000032B54A5641F251B60A2.png" manifest:media-type="image/png"/>
  <manifest:file-entry manifest:full-path="Pictures/10000001000005DC00000190D14FB6FC63FA64BC.png" manifest:media-type="image/png"/>
  <manifest:file-entry manifest:full-path="Pictures/1000000000000434000001D150AD8A280EDB024C.jpg" manifest:media-type="image/jpeg"/>
  <manifest:file-entry manifest:full-path="Pictures/100000000000038400000190010A3403996A3FC1.png" manifest:media-type="image/png"/>
  <manifest:file-entry manifest:full-path="Pictures/1000000100000384000001DCAD9D7F9FB4440B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Calibri3" svg:font-family="Calibri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8.449cm" fo:min-width="19.92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true" fo:min-height="1.897cm" fo:min-width="14.66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21.562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4a7ebb" draw:stroke-linejoin="round" draw:fill="none" draw:textarea-vertical-align="top" draw:auto-grow-height="false" fo:min-height="0cm" fo:min-width="24.52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641cm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ffffff" draw:textarea-vertical-align="middle" draw:auto-grow-height="false" draw:fit-to-size="false" style:shrink-to-fit="false" fo:min-height="8.449cm" fo:min-width="19.926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19.9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8cm"/>
      <style:paragraph-properties style:writing-mode="lr-tb"/>
    </style:style>
    <style:style style:name="gr16" style:family="graphic" style:parent-style-name="standard">
      <style:graphic-properties draw:stroke="none" draw:fill="none" fo:min-height="0.391cm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ffffff" draw:textarea-vertical-align="middle" draw:auto-grow-height="false" draw:fit-to-size="false" style:shrink-to-fit="false" fo:min-height="8.449cm" fo:min-width="19.92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19.162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46cm, 0.899cm, 0.794cm, 1.934cm)" draw:image-opacity="100%" style:mirror="none"/>
    </style:style>
    <style:style style:name="gr21" style:family="graphic" style:parent-style-name="standard">
      <style:graphic-properties draw:stroke="none" draw:fill="none" fo:min-height="0.797cm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82cm, 0cm, 0cm)" draw:image-opacity="100%" style:mirror="none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18.362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1cm, 0.18cm, 0.376cm, 0.178cm)" draw:image-opacity="100%" style:mirror="none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18.162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15.362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0.781cm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20.962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draw:fill="none" fo:min-height="1.561cm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19.562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draw:fill="none" fo:min-height="1.171cm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23.762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23.162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0.853cm"/>
      <style:paragraph-properties style:writing-mode="lr-tb"/>
    </style:style>
    <style:style style:name="gr48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49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23.362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33cm" fo:min-width="5.762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1f497d" loext:opacity="100%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2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3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4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18pt" fo:letter-spacing="normal" fo:font-style="italic" style:text-underline-style="solid" style:text-underline-width="auto" style:text-underline-color="font-color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T6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7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0" style:family="text">
      <style:text-properties fo:font-variant="normal" fo:text-transform="none" fo:color="#1f497d" loext:opacity="100%" style:text-line-through-style="none" style:text-line-through-type="none" style:text-position="0% 100%" style:font-name="Calibri3" fo:font-size="8pt" fo:letter-spacing="normal" fo:font-style="normal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1" style:family="text">
      <style:text-properties fo:font-variant="normal" fo:text-transform="none" fo:color="#1f497d" loext:opacity="100%" style:text-line-through-style="none" style:text-line-through-type="none" style:text-position="0% 100%" style:font-name="Calibri3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2" style:family="text">
      <style:text-properties fo:font-variant="normal" fo:text-transform="none" fo:color="#1f497d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3" style:family="text">
      <style:text-properties fo:font-variant="normal" fo:text-transform="none" fo:color="#1f497d" loext:opacity="100%" style:text-line-through-style="none" style:text-line-through-type="none" style:text-position="0% 100%" style:font-name="Calibri3" fo:font-size="18pt" fo:letter-spacing="normal" fo:font-style="normal" style:text-underline-style="none" style:font-name-asian="Calibri" style:font-size-asian="18pt" style:font-style-asian="normal" style:font-name-complex="Calibri" style:font-size-complex="18pt" style:font-style-complex="normal"/>
    </style:style>
    <style:style style:name="T14" style:family="text">
      <style:text-properties fo:color="#1f497d" loext:opacity="100%" fo:font-size="8pt" style:font-size-asian="8pt" style:font-size-complex="8pt"/>
    </style:style>
    <style:style style:name="T15" style:family="text">
      <style:text-properties fo:font-variant="normal" fo:text-transform="none" fo:color="#1f497d" loext:opacity="100%" style:text-line-through-style="none" style:text-line-through-type="none" style:text-position="0% 100%" style:font-name="Calibri3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" style:family="text">
      <style:text-properties fo:font-variant="normal" fo:text-transform="none" fo:color="#1f497d" loext:opacity="100%" style:text-line-through-style="none" style:text-line-through-type="none" style:text-position="0% 100%" style:font-name="Calibri3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17" style:family="text">
      <style:text-properties fo:font-variant="normal" fo:text-transform="none" fo:color="#1f497d" loext:opacity="100%" style:text-line-through-style="none" style:text-line-through-type="none" style:text-position="0% 100%" style:font-name="Calibri3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8" style:family="text">
      <style:text-properties fo:font-variant="normal" fo:text-transform="none" fo:color="#1f497d" loext:opacity="100%" style:text-line-through-style="none" style:text-line-through-type="none" style:text-position="0% 100%" style:font-name="Calibri3" fo:font-size="18pt" fo:letter-spacing="normal" fo:font-style="normal" style:text-underline-style="solid" style:text-underline-width="auto" style:text-underline-color="font-color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9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3" fo:font-size="8pt" fo:letter-spacing="normal" fo:font-style="normal" fo:text-shadow="none" style:text-underline-style="none" fo:font-weight="normal" style:letter-kerning="true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f497d" loext:opacity="100%" style:text-line-through-style="none" style:text-line-through-type="none" style:text-position="0% 100%" style:font-name="Calibri3" fo:font-size="14pt" fo:letter-spacing="normal" fo:font-style="normal" style:text-underline-style="none" style:font-name-asian="Calibri" style:font-size-asian="18pt" style:font-style-asian="normal" style:font-name-complex="Calibri" style:font-size-complex="18pt" style:font-style-complex="normal"/>
    </style:style>
    <style:style style:name="T21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T22" style:family="text">
      <style:text-properties fo:font-variant="normal" fo:text-transform="none" fo:color="#1f497d" loext:opacity="100%" style:text-line-through-style="none" style:text-line-through-type="none" style:text-position="0% 100%" style:font-name="Calibri3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Google Shape;60;p1" draw:style-name="gr1" draw:text-style-name="P2" draw:layer="layout" svg:width="20.425cm" svg:height="8.698cm" svg:x="4.297cm" svg:y="3.173cm">
          <text:p text:style-name="P1"><text:span text:style-name="T1">Transformers Networks applied to</text:span></text:p>
          <text:p text:style-name="P1"><text:span text:style-name="T1">Natural Language Processing (NL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" draw:style-name="gr2" draw:text-style-name="P2" draw:layer="layout" svg:width="15.16cm" svg:height="2.146cm" svg:x="6.929cm" svg:y="12.67cm">
          <text:p text:style-name="P1"><text:span text:style-name="T2">Patricio Olivares 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" draw:style-name="gr3" draw:text-style-name="P3" draw:layer="layout" svg:width="20.869cm" svg:height="0.001cm" svg:x="3.854cm" svg:y="4.0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;p1" draw:style-name="gr3" draw:text-style-name="P3" draw:layer="layout" svg:width="20.869cm" svg:height="0.001cm" svg:x="3.854cm" svg:y="11.18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57;p1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8;p1:notes" draw:style-name="gr4" draw:layer="layout" svg:width="14.393cm" svg:height="10.477cm" svg:x="3.599cm" svg:y="2.095cm" draw:page-number="1" presentation:class="page"/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custom-shape draw:name="Google Shape;60;p1_0" draw:style-name="gr5" draw:text-style-name="P5" draw:layer="layout" svg:width="20.425cm" svg:height="8.698cm" svg:x="4.297cm" svg:y="3.273cm">
          <text:p text:style-name="P1"><text:span text:style-name="T3">What is Natural Language Processing (NLP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_1" draw:style-name="gr6" draw:text-style-name="P5" draw:layer="layout" svg:width="15.16cm" svg:height="2.146cm" svg:x="6.929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57;p1:notes_0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8;p1:notes_1" draw:style-name="gr4" draw:layer="layout" svg:width="14.393cm" svg:height="10.477cm" svg:x="3.599cm" svg:y="2.095cm" draw:page-number="2" presentation:class="page"/>
        </presentation:notes>
      </draw:page>
      <draw:page draw:name="page3" draw:style-name="dp1" draw:master-page-name="BLANK">
        <office:forms form:automatic-focus="false" form:apply-design-mode="false"/>
        <draw:custom-shape draw:name="Google Shape;69;p2_0" draw:style-name="gr7" draw:text-style-name="P6" draw:layer="layout" svg:width="22.061cm" svg:height="2.579cm" svg:x="5.8cm" svg:y="0.157cm">
          <text:p text:style-name="P1"><text:span text:style-name="T3">What is Natural Language Processing (NLP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2_1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1" draw:style-name="gr9" draw:text-style-name="P8" draw:layer="layout" svg:width="21.189cm" svg:height="10.745cm" svg:x="2.011cm" svg:y="3.171cm">
          <text:list text:style-name="L1">
            <text:list-item>
              <text:p text:style-name="P7"><text:span text:style-name="T4">We referred to all processes that allow computers to </text:span><text:span text:style-name="T5">understand</text:span><text:span text:style-name="T4"> human (written or spoken) language as </text:span><text:span text:style-name="T6">Natural Language Processing </text:span><text:span text:style-name="T4">(NLP).</text:span></text:p>
            </text:list-item>
            <text:list-item>
              <text:p text:style-name="P7"><text:span text:style-name="T4">For a computer, “understand” is a pretty big issue. Natural Language Processing has to deal with:</text:span></text:p>
              <text:list>
                <text:list-item>
                  <text:p text:style-name="P7"><text:span text:style-name="T7">Contextual word and phrases and homonyms</text:span><text:span text:style-name="T4">: “I </text:span><text:span text:style-name="T6">ran</text:span><text:span text:style-name="T4"> to the store because we </text:span><text:span text:style-name="T6">ran</text:span><text:span text:style-name="T4"> out of milk”</text:span></text:p>
                </text:list-item>
                <text:list-item>
                  <text:p text:style-name="P7"><text:span text:style-name="T7">Synonyms</text:span><text:span text:style-name="T4">: </text:span><text:span text:style-name="T8">Small, little, tiny</text:span></text:p>
                </text:list-item>
                <text:list-item>
                  <text:p text:style-name="P7"><text:span text:style-name="T7">Irony and sarcasm</text:span><text:span text:style-name="T4">: “Yeah, right…”</text:span></text:p>
                </text:list-item>
                <text:list-item>
                  <text:p text:style-name="P7"><text:span text:style-name="T7">Human errors</text:span><text:span text:style-name="T4">: Misspelling, mispronunciation, etc.</text:span></text:p>
                </text:list-item>
                <text:list-item>
                  <text:p text:style-name="P7"><text:span text:style-name="T7">Colloquialism and slang</text:span><text:span text:style-name="T4">: <text:s/>“You </text:span><text:span text:style-name="T6">ain’t</text:span><text:span text:style-name="T4"> going to like this”</text:span></text:p>
                </text:list-item>
                <text:list-item>
                  <text:p text:style-name="P7"><text:span text:style-name="T4">Etc..</text:span></text:p>
                </text:list-item>
              </text:list>
            </text:list-item>
          </text:list>
          <text:p text:style-name="P7"><text:span text:style-name="T9"/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0" draw:text-style-name="P9" draw:layer="layout" svg:width="7.381cm" svg:height="5.536cm" svg:x="19.479cm" svg:y="8.013cm">
            <draw:image xlink:href="Pictures/100000000000040000000300F4B7E6DF4A8D52A6.jpg" xlink:type="simple" xlink:show="embed" xlink:actuate="onLoad" draw:mime-type="image/jpeg">
              <text:p/>
            </draw:image>
            <svg:desc>"Words." by ninachildish is marked with CC BY-ND 2.0.</svg:desc>
          </draw:frame>
          <draw:frame draw:style-name="gr11" draw:text-style-name="P11" draw:layer="layout" svg:width="9.204cm" svg:height="0.891cm" svg:x="18.479cm" svg:y="13.549cm">
            <draw:text-box>
              <text:p text:style-name="P10"><text:span text:style-name="T10">Source: "Words." by ninachildish is marked with CC BY-ND 2.0.</text:span></text:p>
            </draw:text-box>
          </draw:frame>
        </draw:g>
        <presentation:notes draw:style-name="dp3">
          <draw:frame draw:name="Google Shape;66;p2:notes_0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1" draw:style-name="gr4" draw:layer="layout" svg:width="14.393cm" svg:height="10.477cm" svg:x="3.599cm" svg:y="2.095cm" draw:page-number="3" presentation:class="page"/>
        </presentation:notes>
      </draw:page>
      <draw:page draw:name="page4" draw:style-name="dp1" draw:master-page-name="BLANK">
        <office:forms form:automatic-focus="false" form:apply-design-mode="false"/>
        <draw:custom-shape draw:name="Google Shape;70;p2_5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5" draw:style-name="gr9" draw:text-style-name="P8" draw:layer="layout" svg:width="21.189cm" svg:height="9.983cm" svg:x="3.211cm" svg:y="3.671cm">
          <text:list text:style-name="L1">
            <text:list-item>
              <text:p text:style-name="P7"><text:span text:style-name="T11">Most of the first solutions on NLP were based on </text:span><text:span text:style-name="T12">hand written</text:span><text:span text:style-name="T11"> rules</text:span></text:p>
            </text:list-item>
            <text:list-item>
              <text:p text:style-name="P7"><text:span text:style-name="T11">As Machine Learning (ML) models gained popularity, a few models were used on NLP</text:span></text:p>
            </text:list-item>
          </text:list>
          <text:list text:style-name="L2">
            <text:list-item>
              <text:list>
                <text:list-item>
                  <text:p text:style-name="P7"><text:span text:style-name="T11">Machine Learning (ML), is defined as the set of techniques used by a computer to </text:span><text:span text:style-name="T12">learn </text:span><text:span text:style-name="T11">from data</text:span></text:p>
                </text:list-item>
                <text:list-item>
                  <text:p text:style-name="P7"><text:span text:style-name="T11">Some popular ML models used on NLP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11">Naive Bayes</text:span></text:p>
                    </text:list-item>
                    <text:list-item>
                      <text:p text:style-name="P7"><text:span text:style-name="T11">Support Vector Machines</text:span></text:p>
                    </text:list-item>
                    <text:list-item>
                      <text:p text:style-name="P7"><text:span text:style-name="T11">Maximum Entropy</text:span></text:p>
                    </text:list-item>
                    <text:list-item>
                      <text:p text:style-name="P7"><text:span text:style-name="T12">Neural Networks/Deep Neural Networks</text:span></text:p>
                    </text:list-item>
                  </text:list>
                </text:list-item>
              </text:list>
            </text:list-item>
          </text:list>
          <text:p text:style-name="P7"><text:span text:style-name="T9"/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0" draw:text-style-name="P9" draw:layer="layout" svg:width="7.381cm" svg:height="5.536cm" svg:x="19.479cm" svg:y="8.013cm">
            <draw:image xlink:href="Pictures/100000000000040000000300F4B7E6DF4A8D52A6.jpg" xlink:type="simple" xlink:show="embed" xlink:actuate="onLoad" draw:mime-type="image/jpeg">
              <text:p/>
            </draw:image>
            <svg:desc>"Words." by ninachildish is marked with CC BY-ND 2.0.</svg:desc>
          </draw:frame>
          <draw:frame draw:style-name="gr11" draw:text-style-name="P11" draw:layer="layout" svg:width="9.204cm" svg:height="0.891cm" svg:x="18.479cm" svg:y="13.549cm">
            <draw:text-box>
              <text:p text:style-name="P12"><text:span text:style-name="T10">Source: "Words." by ninachildish is marked with CC BY-ND 2.0.</text:span></text:p>
            </draw:text-box>
          </draw:frame>
        </draw:g>
        <draw:custom-shape draw:name="Google Shape;69;p2_4" draw:style-name="gr7" draw:text-style-name="P6" draw:layer="layout" svg:width="22.061cm" svg:height="2.579cm" svg:x="5.8cm" svg:y="0.157cm">
          <text:p text:style-name="P1"><text:span text:style-name="T3">What is Natural Language Processing (NLP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66;p2:notes_4" presentation:style-name="pr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5" draw:style-name="gr4" draw:layer="layout" svg:width="14.393cm" svg:height="10.477cm" svg:x="3.599cm" svg:y="2.095cm" draw:page-number="4" presentation:class="page"/>
        </presentation:notes>
      </draw:page>
      <draw:page draw:name="page5" draw:style-name="dp1" draw:master-page-name="BLANK" presentation:presentation-page-layout-name="AL1T0">
        <office:forms form:automatic-focus="false" form:apply-design-mode="false"/>
        <draw:custom-shape draw:name="Google Shape;60;p1_1" draw:style-name="gr12" draw:text-style-name="P5" draw:layer="layout" svg:width="20.425cm" svg:height="8.698cm" svg:x="4.297cm" svg:y="3.273cm">
          <text:p text:style-name="P1"><text:span text:style-name="T3">Neural Networks/Deep Neural Network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_2" draw:style-name="gr6" draw:text-style-name="P5" draw:layer="layout" svg:width="15.16cm" svg:height="2.146cm" svg:x="6.929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57;p1:notes_1" presentation:style-name="pr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8;p1:notes_2" draw:style-name="gr4" draw:layer="layout" svg:width="14.393cm" svg:height="10.477cm" svg:x="3.599cm" svg:y="2.095cm" draw:page-number="5" presentation:class="page"/>
        </presentation:notes>
      </draw:page>
      <draw:page draw:name="page6" draw:style-name="dp1" draw:master-page-name="BLANK">
        <office:forms form:automatic-focus="false" form:apply-design-mode="false"/>
        <draw:custom-shape draw:name="Google Shape;69;p2_1" draw:style-name="gr13" draw:text-style-name="P6" draw:layer="layout" svg:width="20.4cm" svg:height="2.579cm" svg:x="7.4cm" svg:y="0.157cm">
          <text:p text:style-name="P1"><text:span text:style-name="T3">Neural Networks/Deep Neural Network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2_2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2" draw:style-name="gr9" draw:text-style-name="P14" draw:layer="layout" svg:width="21.189cm" svg:height="5.583cm" svg:x="3.211cm" svg:y="2.971cm">
          <text:list text:style-name="L1">
            <text:list-item>
              <text:p text:style-name="P13"><text:span text:style-name="T12">Neural Networks (NN)</text:span><text:span text:style-name="T13"> are a set of Machine Learning models </text:span><text:span text:style-name="T12">inspired</text:span><text:span text:style-name="T13"> on the human brain.</text:span></text:p>
            </text:list-item>
            <text:list-item>
              <text:p text:style-name="P13"><text:span text:style-name="T13">The building blocks of NN are </text:span><text:span text:style-name="T12">the neurons</text:span><text:span text:style-name="T11">. Neurons can be connected.</text:span></text:p>
            </text:list-item>
            <text:list-item>
              <text:p text:style-name="P13"><text:span text:style-name="T13">NN can be split in sub groups of neurons called </text:span><text:span text:style-name="T12">layers</text:span><text:span text:style-name="T11">.</text:span></text:p>
            </text:list-item>
            <text:list-item>
              <text:p text:style-name="P13"><text:span text:style-name="T11">A NN with a large number of layers is called a </text:span><text:span text:style-name="T12">Deep Neural Network (DN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0" draw:text-style-name="P15" draw:layer="layout" svg:width="11.928cm" svg:height="3.965cm" svg:x="2.8cm" svg:y="8.6cm">
            <draw:image xlink:href="Pictures/100000000000044F000001797E4D0F664E1B6A37.png" xlink:type="simple" xlink:show="embed" xlink:actuate="onLoad" draw:mime-type="image/png">
              <text:p/>
            </draw:image>
          </draw:frame>
          <draw:frame draw:style-name="gr14" draw:text-style-name="P16" draw:layer="layout" svg:width="7.962cm" svg:height="2.035cm" svg:x="4.726cm" svg:y="12.565cm">
            <draw:text-box>
              <text:p text:style-name="P10"><text:span text:style-name="T14">A single neuron. “Hands-on Machine Learning with Scikit-Learn, Keras &amp; TensorFlow”</text:span></text:p>
            </draw:text-box>
          </draw:frame>
        </draw:g>
        <draw:g>
          <draw:g>
            <draw:frame draw:style-name="gr10" draw:text-style-name="P9" draw:layer="layout" svg:width="7.802cm" svg:height="3.577cm" svg:x="16.066cm" svg:y="8.409cm">
              <draw:image xlink:href="Pictures/1000000000000454000001FCB32BB344EA6D612F.png" xlink:type="simple" xlink:show="embed" xlink:actuate="onLoad" draw:mime-type="image/png">
                <text:p/>
              </draw:image>
            </draw:frame>
            <draw:frame draw:style-name="gr10" draw:text-style-name="P9" draw:layer="layout" svg:width="11.002cm" svg:height="5.045cm" svg:x="15.8cm" svg:y="8.004cm">
              <draw:image xlink:href="Pictures/1000000000000454000001FCB32BB344EA6D612F.png" xlink:type="simple" xlink:show="embed" xlink:actuate="onLoad" draw:mime-type="image/png">
                <text:p/>
              </draw:image>
            </draw:frame>
          </draw:g>
          <draw:frame draw:style-name="gr15" draw:text-style-name="P16" draw:layer="layout" svg:width="9.319cm" svg:height="1.388cm" svg:x="16.268cm" svg:y="13.049cm">
            <draw:text-box>
              <text:p text:style-name="P10"><text:span text:style-name="T14">A Neural Network. “Hands-on Machine Learning with Scikit-Learn, Keras &amp; TensorFlow”</text:span></text:p>
            </draw:text-box>
          </draw:frame>
        </draw:g>
        <presentation:notes draw:style-name="dp3">
          <draw:frame draw:name="Google Shape;66;p2:notes_1"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2" draw:style-name="gr4" draw:layer="layout" svg:width="14.393cm" svg:height="10.477cm" svg:x="3.599cm" svg:y="2.095cm" draw:page-number="6" presentation:class="page"/>
        </presentation:notes>
      </draw:page>
      <draw:page draw:name="page7" draw:style-name="dp1" draw:master-page-name="BLANK">
        <office:forms form:automatic-focus="false" form:apply-design-mode="false"/>
        <draw:custom-shape draw:name="Google Shape;70;p2_16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0" draw:style-name="gr9" draw:text-style-name="P14" draw:layer="layout" svg:width="21.189cm" svg:height="4.059cm" svg:x="3.211cm" svg:y="2.871cm">
          <text:list text:style-name="L1">
            <text:list-item>
              <text:p text:style-name="P13"><text:span text:style-name="T13">Neural Networks can </text:span><text:span text:style-name="T12">learn</text:span><text:span text:style-name="T11"> certain tasks by </text:span><text:span text:style-name="T12">training</text:span><text:span text:style-name="T11">.</text:span></text:p>
              <text:list>
                <text:list-item>
                  <text:p text:style-name="P13"><text:span text:style-name="T11">On each </text:span><text:span text:style-name="T12">training step</text:span><text:span text:style-name="T11">, you show an input and the expected result for that input.</text:span></text:p>
                </text:list-item>
                <text:list-item>
                  <text:p text:style-name="P13"><text:span text:style-name="T11">For each error, you have adjust the weights until you have the desired result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0" draw:text-style-name="P9" draw:layer="layout" svg:width="12.553cm" svg:height="6.738cm" svg:x="7.2cm" svg:y="6.74cm">
            <draw:image xlink:href="Pictures/10000000000005EE0000033D1365D12CC18A73CC.png" xlink:type="simple" xlink:show="embed" xlink:actuate="onLoad" draw:mime-type="image/png">
              <text:p/>
            </draw:image>
          </draw:frame>
          <draw:frame draw:style-name="gr16" draw:text-style-name="P17" draw:layer="layout" svg:width="16cm" svg:height="0.641cm" svg:x="7.2cm" svg:y="13.78cm">
            <draw:text-box>
              <text:p><text:span text:style-name="T10">Source: https://purnasaigudikandula.medium.com/recurrent-neural-networks-and-lstm-explained-7f51c7f6bbb9</text:span></text:p>
            </draw:text-box>
          </draw:frame>
        </draw:g>
        <draw:custom-shape draw:name="Google Shape;69;p2_8" draw:style-name="gr13" draw:text-style-name="P6" draw:layer="layout" svg:width="20.4cm" svg:height="2.579cm" svg:x="7.4cm" svg:y="0.157cm">
          <text:p text:style-name="P1"><text:span text:style-name="T3">Neural Networks/Deep Neural Network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66;p2:notes_15" presentation:style-name="pr7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0" draw:style-name="gr4" draw:layer="layout" svg:width="14.393cm" svg:height="10.477cm" svg:x="3.599cm" svg:y="2.095cm" draw:page-number="7" presentation:class="page"/>
        </presentation:notes>
      </draw:page>
      <draw:page draw:name="page8" draw:style-name="dp1" draw:master-page-name="BLANK" presentation:presentation-page-layout-name="AL1T0">
        <office:forms form:automatic-focus="false" form:apply-design-mode="false"/>
        <draw:custom-shape draw:name="Google Shape;60;p1_2" draw:style-name="gr17" draw:text-style-name="P5" draw:layer="layout" svg:width="20.425cm" svg:height="8.698cm" svg:x="4.297cm" svg:y="3.273cm">
          <text:p text:style-name="P1"><text:span text:style-name="T3">Deep Learning on N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_3" draw:style-name="gr6" draw:text-style-name="P5" draw:layer="layout" svg:width="15.16cm" svg:height="2.146cm" svg:x="6.929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57;p1:notes_2" presentation:style-name="pr8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8;p1:notes_3" draw:style-name="gr4" draw:layer="layout" svg:width="14.393cm" svg:height="10.477cm" svg:x="3.599cm" svg:y="2.095cm" draw:page-number="8" presentation:class="page"/>
        </presentation:notes>
      </draw:page>
      <draw:page draw:name="page9" draw:style-name="dp1" draw:master-page-name="BLANK">
        <office:forms form:automatic-focus="false" form:apply-design-mode="false"/>
        <draw:custom-shape draw:name="Google Shape;70;p2_9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10" draw:style-name="gr18" draw:text-style-name="P8" draw:layer="layout" svg:width="21.189cm" svg:height="10.157cm" svg:x="3.211cm" svg:y="2.471cm">
          <text:list text:style-name="L1">
            <text:list-item>
              <text:p text:style-name="P7"><text:span text:style-name="T11">First, we need to decide how we will divide our text to process it. This is called </text:span><text:span text:style-name="T12">tokenization</text:span><text:span text:style-name="T11">.</text:span></text:p>
            </text:list-item>
            <text:list-item>
              <text:p text:style-name="P7"><text:span text:style-name="T11">There are different kinds of tokenization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9" draw:style-name="gr19" draw:text-style-name="P6" draw:layer="layout" svg:width="19.661cm" svg:height="2.579cm" svg:x="8.2cm" svg:y="0.157cm">
          <text:p text:style-name="P1"><text:span text:style-name="T3">Deep Learning on NLP - Toke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0" draw:text-style-name="P9" draw:layer="layout" svg:width="13.163cm" svg:height="6.984cm" svg:x="7.435cm" svg:y="5.357cm">
            <draw:image xlink:href="Pictures/100000000000036B000001FA4E64BBAA9D54B913.png" xlink:type="simple" xlink:show="embed" xlink:actuate="onLoad" draw:mime-type="image/png">
              <text:p/>
            </draw:image>
          </draw:frame>
          <draw:g>
            <draw:frame draw:style-name="gr21" draw:text-style-name="P11" draw:layer="layout" svg:width="12.694cm" svg:height="1.047cm" svg:x="7.2cm" svg:y="12.353cm">
              <draw:text-box>
                <text:p text:style-name="P10"><text:span text:style-name="T10">Source: https://towardsdatascience.com/tokenization-for-natural-language-processing-a179a891bad4</text:span></text:p>
              </draw:text-box>
            </draw:frame>
          </draw:g>
        </draw:g>
        <presentation:notes draw:style-name="dp3">
          <draw:frame draw:name="Google Shape;66;p2:notes_9" presentation:style-name="pr9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10" draw:style-name="gr4" draw:layer="layout" svg:width="14.393cm" svg:height="10.477cm" svg:x="3.599cm" svg:y="2.095cm" draw:page-number="9" presentation:class="page"/>
        </presentation:notes>
      </draw:page>
      <draw:page draw:name="page10" draw:style-name="dp1" draw:master-page-name="BLANK">
        <office:forms form:automatic-focus="false" form:apply-design-mode="false"/>
        <draw:custom-shape draw:name="Google Shape;70;p2_10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11" draw:style-name="gr22" draw:text-style-name="P8" draw:layer="layout" svg:width="21.189cm" svg:height="9.395cm" svg:x="3.211cm" svg:y="2.471cm">
          <text:list text:style-name="L1">
            <text:list-item>
              <text:p text:style-name="P7"><text:span text:style-name="T11">Example: White Space Tokenization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10" draw:style-name="gr19" draw:text-style-name="P6" draw:layer="layout" svg:width="19.661cm" svg:height="2.579cm" svg:x="8.2cm" svg:y="0.157cm">
          <text:p text:style-name="P1"><text:span text:style-name="T3">Deep Learning on NLP - Toke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3" draw:text-style-name="P9" draw:layer="layout" svg:width="20.911cm" svg:height="6.6cm" svg:x="3.888cm" svg:y="5cm">
            <draw:image xlink:href="Pictures/10000000000004DB00000181CA3F9E9D3DAC2157.png" xlink:type="simple" xlink:show="embed" xlink:actuate="onLoad" draw:mime-type="image/png">
              <text:p/>
            </draw:image>
          </draw:frame>
          <draw:frame draw:style-name="gr21" draw:text-style-name="P11" draw:layer="layout" svg:width="12.694cm" svg:height="1.047cm" svg:x="7.2cm" svg:y="11.654cm">
            <draw:text-box>
              <text:p text:style-name="P10"><text:span text:style-name="T10">Source: https://www.analyticsvidhya.com/blog/2019/07/how-get-started-nlp-6-unique-ways-perform-tokenization/</text:span></text:p>
            </draw:text-box>
          </draw:frame>
        </draw:g>
        <presentation:notes draw:style-name="dp3">
          <draw:frame draw:name="Google Shape;66;p2:notes_10" presentation:style-name="pr10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11" draw:style-name="gr4" draw:layer="layout" svg:width="14.393cm" svg:height="10.477cm" svg:x="3.599cm" svg:y="2.095cm" draw:page-number="10" presentation:class="page"/>
        </presentation:notes>
      </draw:page>
      <draw:page draw:name="page11" draw:style-name="dp1" draw:master-page-name="BLANK">
        <office:forms form:automatic-focus="false" form:apply-design-mode="false"/>
        <draw:custom-shape draw:name="Google Shape;70;p2_0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6" draw:style-name="gr24" draw:text-style-name="P8" draw:layer="layout" svg:width="21.189cm" svg:height="7.697cm" svg:x="3.211cm" svg:y="2.471cm">
          <text:list text:style-name="L1">
            <text:list-item>
              <text:p text:style-name="P7"><text:span text:style-name="T11">Deep Neural Networks are not compatible with “words”. </text:span></text:p>
            </text:list-item>
            <text:list-item>
              <text:p text:style-name="P7"><text:span text:style-name="T11">We need to translate words to numbers. Some techniques are:</text:span></text:p>
              <text:list>
                <text:list-item>
                  <text:p text:style-name="P7"><text:span text:style-name="T15">Replacement</text:span><text:span text:style-name="T11">: Replace a word with a number</text:span><text:span text:style-name="T11"><text:line-break/></text:span><text:span text:style-name="T11"><text:line-break/></text:span><text:span text:style-name="T11"><text:line-break/></text:span><text:span text:style-name="T11"/></text:p>
                </text:list-item>
                <text:list-item>
                  <text:p text:style-name="P7"><text:span text:style-name="T15">One Hot Encoding</text:span><text:span text:style-name="T11">: Replace a word with a vector. The vector contains information about word presence.</text:span></text:p>
                </text:list-item>
              </text:list>
            </text:list-item>
          </text:list>
          <text:p text:style-name="P7"><text:span text:style-name="T9"/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5" draw:style-name="gr25" draw:text-style-name="P6" draw:layer="layout" svg:width="18.861cm" svg:height="2.579cm" svg:x="9cm" svg:y="0.157cm">
          <text:p text:style-name="P1"><text:span text:style-name="T3">Deep Learning on NLP - Embe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4.356cm" svg:height="1.693cm" svg:x="5.244cm" svg:y="5.288cm">
          <draw:image xlink:href="Pictures/10000001000003250000005FEF8F71999550046A.png" xlink:type="simple" xlink:show="embed" xlink:actuate="onLoad" draw:mime-type="image/png">
            <text:p/>
          </draw:image>
        </draw:frame>
        <draw:frame draw:style-name="gr10" draw:text-style-name="P9" draw:layer="layout" svg:width="11.657cm" svg:height="5.302cm" svg:x="6.7cm" svg:y="9.098cm">
          <draw:image xlink:href="Pictures/100000010000033F0000017A74B0CF8018E8E555.png" xlink:type="simple" xlink:show="embed" xlink:actuate="onLoad" draw:mime-type="image/png">
            <text:p/>
          </draw:image>
        </draw:frame>
        <presentation:notes draw:style-name="dp3">
          <draw:frame draw:name="Google Shape;66;p2:notes_5" presentation:style-name="pr1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6" draw:style-name="gr4" draw:layer="layout" svg:width="14.393cm" svg:height="10.477cm" svg:x="3.599cm" svg:y="2.095cm" draw:page-number="11" presentation:class="page"/>
        </presentation:notes>
      </draw:page>
      <draw:page draw:name="page12" draw:style-name="dp1" draw:master-page-name="BLANK">
        <office:forms form:automatic-focus="false" form:apply-design-mode="false"/>
        <draw:custom-shape draw:name="Google Shape;70;p2_6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7" draw:style-name="gr26" draw:text-style-name="P8" draw:layer="layout" svg:width="21.189cm" svg:height="13.755cm" svg:x="3.211cm" svg:y="2.471cm">
          <text:list text:style-name="L1">
            <text:list-item>
              <text:p text:style-name="P7"><text:span text:style-name="T11">Deep Neural Networks are not compatible with “words”. </text:span></text:p>
            </text:list-item>
            <text:list-item>
              <text:p text:style-name="P7"><text:span text:style-name="T11">We need to </text:span><text:span text:style-name="T16">translate words to numbers</text:span><text:span text:style-name="T11">. Some techniques are:</text:span></text:p>
              <text:list>
                <text:list-item>
                  <text:p text:style-name="P7"><text:span text:style-name="T15">Embedding</text:span><text:span text:style-name="T11">: Replace a word with a vector with </text:span><text:span text:style-name="T12">information</text:span><text:span text:style-name="T11"> about the word and its </text:span><text:span text:style-name="T12">relation</text:span><text:span text:style-name="T11"> with other words. (E.g. </text:span><text:span text:style-name="T16">Word2Vec</text:span><text:span text:style-name="T11">)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    <text:p text:style-name="P7"><text:span text:style-name="T11"><text:line-break/></text:span><text:span text:style-name="T11"><text:line-break/></text:span><text:span text:style-name="T11"><text:line-break/></text:span><text:span text:style-name="T17">Check </text:span><text:span text:style-name="T17"><text:a xlink:href="https://projector.tensorflow.org/" xlink:type="simple">https://projector.tensorflow.org/</text:a></text:span></text:p>
                </text:list-item>
              </text:list>
            </text:list-item>
          </text:list>
          <text:p text:style-name="P7"><text:span text:style-name="T9"/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9" draw:layer="layout" svg:width="12.799cm" svg:height="8.106cm" svg:x="7cm" svg:y="5.693cm">
          <draw:image xlink:href="Pictures/100000000000036B00000252BC92EDE32AE05D24.png" xlink:type="simple" xlink:show="embed" xlink:actuate="onLoad" draw:mime-type="image/png">
            <text:p/>
          </draw:image>
        </draw:frame>
        <draw:custom-shape draw:name="Google Shape;69;p2_6" draw:style-name="gr25" draw:text-style-name="P6" draw:layer="layout" svg:width="18.861cm" svg:height="2.579cm" svg:x="9cm" svg:y="0.157cm">
          <text:p text:style-name="P1"><text:span text:style-name="T3">Deep Learning on NLP - Embe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66;p2:notes_6" presentation:style-name="pr1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7" draw:style-name="gr4" draw:layer="layout" svg:width="14.393cm" svg:height="10.477cm" svg:x="3.599cm" svg:y="2.095cm" draw:page-number="12" presentation:class="page"/>
        </presentation:notes>
      </draw:page>
      <draw:page draw:name="page13" draw:style-name="dp1" draw:master-page-name="BLANK">
        <office:forms form:automatic-focus="false" form:apply-design-mode="false"/>
        <draw:custom-shape draw:name="Google Shape;70;p2_7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8" draw:style-name="gr28" draw:text-style-name="P8" draw:layer="layout" svg:width="21.189cm" svg:height="7.107cm" svg:x="3.211cm" svg:y="4.671cm">
          <text:list text:style-name="L1">
            <text:list-item>
              <text:p text:style-name="P7"><text:span text:style-name="T11">Now, with this new representation, we can start </text:span><text:span text:style-name="T12">understanding</text:span><text:span text:style-name="T11"> each phrase.</text:span></text:p>
            </text:list-item>
            <text:list-item>
              <text:p text:style-name="P7"><text:span text:style-name="T11">The information from a phrase does not only rely on the individual meaning of each word, but also on its </text:span><text:span text:style-name="T12">context</text:span><text:span text:style-name="T11">.</text:span><text:span text:style-name="T11"><text:line-break/>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The apple is </text:span><text:span text:style-name="T12">red.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1">The apple is </text:span><text:span text:style-name="T12">not red.</text:span><text:span text:style-name="T12"><text:line-break/></text:span><text:span text:style-name="T12"/></text:p>
            </text:list-item>
            <text:list-item>
              <text:p text:style-name="P7"><text:span text:style-name="T11">One approach is using </text:span><text:span text:style-name="T12">Recurrent Neural Networks (RN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7" draw:style-name="gr29" draw:text-style-name="P6" draw:layer="layout" svg:width="18.661cm" svg:height="2.579cm" svg:x="9.2cm" svg:y="0.157cm">
          <text:p text:style-name="P1"><text:span text:style-name="T3">Deep Learning on NLP – 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66;p2:notes_7" presentation:style-name="pr1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8" draw:style-name="gr4" draw:layer="layout" svg:width="14.393cm" svg:height="10.477cm" svg:x="3.599cm" svg:y="2.095cm" draw:page-number="13" presentation:class="page"/>
        </presentation:notes>
      </draw:page>
      <draw:page draw:name="page14" draw:style-name="dp1" draw:master-page-name="BLANK">
        <office:forms form:automatic-focus="false" form:apply-design-mode="false"/>
        <draw:custom-shape draw:name="Google Shape;70;p2_4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4" draw:style-name="gr30" draw:text-style-name="P8" draw:layer="layout" svg:width="21.189cm" svg:height="3.297cm" svg:x="3.211cm" svg:y="3.371cm">
          <text:list text:style-name="L1">
            <text:list-item>
              <text:p text:style-name="P7"><text:span text:style-name="T13">A </text:span><text:span text:style-name="T12">Recurrent Neural Network (RNN) </text:span><text:span text:style-name="T11">are used mostly</text:span><text:span text:style-name="T12"> </text:span><text:span text:style-name="T11">for sequential data.</text:span></text:p>
            </text:list-item>
            <text:list-item>
              <text:p text:style-name="P7"><text:span text:style-name="T11">Each output neuron depends not only on the present input, but also on what happened on the last training ste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3" draw:style-name="gr31" draw:text-style-name="P6" draw:layer="layout" svg:width="15.861cm" svg:height="2.579cm" svg:x="12cm" svg:y="0.157cm">
          <text:p text:style-name="P1"><text:span text:style-name="T3">Deep Learning on NLP – R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0" draw:text-style-name="P9" draw:layer="layout" svg:width="19.475cm" svg:height="5.193cm" svg:x="4.725cm" svg:y="7.2cm">
            <draw:image xlink:href="Pictures/10000001000005DC00000190D14FB6FC63FA64BC.png" xlink:type="simple" xlink:show="embed" xlink:actuate="onLoad" draw:mime-type="image/png">
              <text:p/>
            </draw:image>
          </draw:frame>
          <draw:frame draw:style-name="gr16" draw:text-style-name="P17" draw:layer="layout" svg:width="16.344cm" svg:height="0.641cm" svg:x="5.557cm" svg:y="12.9cm">
            <draw:text-box>
              <text:p><text:span text:style-name="T10">Source: https://stanford.edu/~shervine/teaching/cs-230/cheatsheet-recurrent-neural-networks</text:span></text:p>
            </draw:text-box>
          </draw:frame>
        </draw:g>
        <presentation:notes draw:style-name="dp3">
          <draw:frame draw:name="Google Shape;66;p2:notes_3" presentation:style-name="pr1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4" draw:style-name="gr4" draw:layer="layout" svg:width="14.393cm" svg:height="10.477cm" svg:x="3.599cm" svg:y="2.095cm" draw:page-number="14" presentation:class="page"/>
        </presentation:notes>
      </draw:page>
      <draw:page draw:name="page15" draw:style-name="dp1" draw:master-page-name="BLANK">
        <office:forms form:automatic-focus="false" form:apply-design-mode="false"/>
        <draw:custom-shape draw:name="Google Shape;70;p2_15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16" draw:style-name="gr32" draw:text-style-name="P8" draw:layer="layout" svg:width="21.189cm" svg:height="2.535cm" svg:x="3.211cm" svg:y="3.371cm">
          <text:list text:style-name="L1">
            <text:list-item>
              <text:p text:style-name="P7"><text:span text:style-name="T11">Types of RNN architectures</text:span></text:p>
              <text:list>
                <text:list-item>
                  <text:p text:style-name="P7"><text:span text:style-name="T15">Many to One</text:span><text:span text:style-name="T11">: Multiple inputs are used to obtain one output. E.g. classific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16" draw:style-name="gr31" draw:text-style-name="P6" draw:layer="layout" svg:width="15.861cm" svg:height="2.579cm" svg:x="12cm" svg:y="0.157cm">
          <text:p text:style-name="P1"><text:span text:style-name="T3">Deep Learning on NLP – R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6cm" svg:height="6.914cm" svg:x="4.9cm" svg:y="6.264cm">
          <draw:image xlink:href="Pictures/1000000000000434000001D150AD8A280EDB024C.jpg" xlink:type="simple" xlink:show="embed" xlink:actuate="onLoad" draw:mime-type="image/jpeg">
            <text:p/>
          </draw:image>
        </draw:frame>
        <draw:frame draw:style-name="gr33" draw:text-style-name="P15" draw:layer="layout" svg:width="11.42cm" svg:height="1.031cm" svg:x="7.6cm" svg:y="13.464cm">
          <draw:text-box>
            <text:p text:style-name="P10"><text:span text:style-name="T10">Source: https://medium.com/analytics-vidhya/natural-language-processing-from-basics-to-using-rnn-and-lstm-ef6779e4ae66</text:span></text:p>
          </draw:text-box>
        </draw:frame>
        <presentation:notes draw:style-name="dp3">
          <draw:frame draw:name="Google Shape;66;p2:notes_16" presentation:style-name="pr1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16" draw:style-name="gr4" draw:layer="layout" svg:width="14.393cm" svg:height="10.477cm" svg:x="3.599cm" svg:y="2.095cm" draw:page-number="15" presentation:class="page"/>
        </presentation:notes>
      </draw:page>
      <draw:page draw:name="page16" draw:style-name="dp1" draw:master-page-name="BLANK">
        <office:forms form:automatic-focus="false" form:apply-design-mode="false"/>
        <draw:custom-shape draw:name="Google Shape;70;p2_17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17" draw:style-name="gr34" draw:text-style-name="P8" draw:layer="layout" svg:width="21.189cm" svg:height="2.535cm" svg:x="3.211cm" svg:y="3.371cm">
          <text:list text:style-name="L1">
            <text:list-item>
              <text:p text:style-name="P7"><text:span text:style-name="T11">Types of RNN architectures</text:span></text:p>
              <text:list>
                <text:list-item>
                  <text:p text:style-name="P7"><text:span text:style-name="T15">One to Many</text:span><text:span text:style-name="T11">: A single input produces multiple outputs. E. g. Music gener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17" draw:style-name="gr31" draw:text-style-name="P6" draw:layer="layout" svg:width="15.861cm" svg:height="2.579cm" svg:x="12cm" svg:y="0.157cm">
          <text:p text:style-name="P1"><text:span text:style-name="T3">Deep Learning on NLP – R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5" draw:layer="layout" svg:width="11.42cm" svg:height="1.031cm" svg:x="7.6cm" svg:y="13.464cm">
          <draw:text-box>
            <text:p text:style-name="P10"><text:span text:style-name="T10">Source: https://medium.com/analytics-vidhya/natural-language-processing-from-basics-to-using-rnn-and-lstm-ef6779e4ae66</text:span></text:p>
          </draw:text-box>
        </draw:frame>
        <draw:frame draw:style-name="gr10" draw:text-style-name="P9" draw:layer="layout" svg:width="14.065cm" svg:height="6.251cm" svg:x="6.2cm" svg:y="6.8cm">
          <draw:image xlink:href="Pictures/100000000000038400000190010A3403996A3FC1.png" xlink:type="simple" xlink:show="embed" xlink:actuate="onLoad" draw:mime-type="image/png">
            <text:p/>
          </draw:image>
        </draw:frame>
        <presentation:notes draw:style-name="dp3">
          <draw:frame draw:name="Google Shape;66;p2:notes_17" presentation:style-name="pr1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17" draw:style-name="gr4" draw:layer="layout" svg:width="14.393cm" svg:height="10.477cm" svg:x="3.599cm" svg:y="2.095cm" draw:page-number="16" presentation:class="page"/>
        </presentation:notes>
      </draw:page>
      <draw:page draw:name="page17" draw:style-name="dp1" draw:master-page-name="BLANK">
        <office:forms form:automatic-focus="false" form:apply-design-mode="false"/>
        <draw:custom-shape draw:name="Google Shape;70;p2_18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18" draw:style-name="gr35" draw:text-style-name="P8" draw:layer="layout" svg:width="21.189cm" svg:height="2.535cm" svg:x="3.211cm" svg:y="3.371cm">
          <text:list text:style-name="L1">
            <text:list-item>
              <text:p text:style-name="P7"><text:span text:style-name="T11">Types of RNN architectures</text:span></text:p>
              <text:list>
                <text:list-item>
                  <text:p text:style-name="P7"><text:span text:style-name="T15">Many to Many</text:span><text:span text:style-name="T11">: Multiple inputs produce multiple outputs. E. g. Transl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18" draw:style-name="gr31" draw:text-style-name="P6" draw:layer="layout" svg:width="15.861cm" svg:height="2.579cm" svg:x="12cm" svg:y="0.157cm">
          <text:p text:style-name="P1"><text:span text:style-name="T3">Deep Learning on NLP – R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5" draw:layer="layout" svg:width="11.42cm" svg:height="1.031cm" svg:x="7.6cm" svg:y="13.464cm">
          <draw:text-box>
            <text:p text:style-name="P10"><text:span text:style-name="T10">Source: https://medium.com/analytics-vidhya/natural-language-processing-from-basics-to-using-rnn-and-lstm-ef6779e4ae66</text:span></text:p>
          </draw:text-box>
        </draw:frame>
        <draw:frame draw:style-name="gr10" draw:text-style-name="P9" draw:layer="layout" svg:width="14.407cm" svg:height="7.619cm" svg:x="6.6cm" svg:y="5.781cm">
          <draw:image xlink:href="Pictures/1000000100000384000001DCAD9D7F9FB4440B31.png" xlink:type="simple" xlink:show="embed" xlink:actuate="onLoad" draw:mime-type="image/png">
            <text:p/>
          </draw:image>
        </draw:frame>
        <presentation:notes draw:style-name="dp3">
          <draw:frame draw:name="Google Shape;66;p2:notes_18" presentation:style-name="pr17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18" draw:style-name="gr4" draw:layer="layout" svg:width="14.393cm" svg:height="10.477cm" svg:x="3.599cm" svg:y="2.095cm" draw:page-number="17" presentation:class="page"/>
        </presentation:notes>
      </draw:page>
      <draw:page draw:name="page18" draw:style-name="dp1" draw:master-page-name="BLANK">
        <office:forms form:automatic-focus="false" form:apply-design-mode="false"/>
        <draw:custom-shape draw:name="Google Shape;70;p2_19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19" draw:style-name="gr36" draw:text-style-name="P8" draw:layer="layout" svg:width="21.189cm" svg:height="4.821cm" svg:x="3.211cm" svg:y="3.371cm">
          <text:list text:style-name="L1">
            <text:list-item>
              <text:p text:style-name="P7"><text:span text:style-name="T11">Limitations of RNN:</text:span></text:p>
              <text:list>
                <text:list-item>
                  <text:p text:style-name="P7"><text:span text:style-name="T11">Dependency on data can be possible in only one direction: only data before can affect data later.</text:span></text:p>
                </text:list-item>
                <text:list-item>
                  <text:p text:style-name="P7"><text:span text:style-name="T11">RNN are not capable to capture long term dependencies.</text:span><text:span text:style-name="T11"><text:line-break/></text:span><text:span text:style-name="T11"/></text:p>
                </text:list-item>
              </text:list>
            </text:list-item>
            <text:list-item>
              <text:p text:style-name="P7"><text:span text:style-name="T11">In order to improve, we have to put more </text:span><text:span text:style-name="T18">attention</text:span><text:span text:style-name="T12">!</text:span><text:span text:style-name="T11">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19" draw:style-name="gr31" draw:text-style-name="P6" draw:layer="layout" svg:width="15.861cm" svg:height="2.579cm" svg:x="12cm" svg:y="0.157cm">
          <text:p text:style-name="P1"><text:span text:style-name="T3">Deep Learning on NLP – R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66;p2:notes_19" presentation:style-name="pr18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19" draw:style-name="gr4" draw:layer="layout" svg:width="14.393cm" svg:height="10.477cm" svg:x="3.599cm" svg:y="2.095cm" draw:page-number="18" presentation:class="page"/>
        </presentation:notes>
      </draw:page>
      <draw:page draw:name="page19" draw:style-name="dp1" draw:master-page-name="BLANK">
        <office:forms form:automatic-focus="false" form:apply-design-mode="false"/>
        <draw:custom-shape draw:name="Google Shape;70;p2_11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12" draw:style-name="gr37" draw:text-style-name="P8" draw:layer="layout" svg:width="13cm" svg:height="7.869cm" svg:x="3.2cm" svg:y="3.2cm">
          <text:list text:style-name="L1">
            <text:list-item>
              <text:p text:style-name="P7"><text:span text:style-name="T13">Attention mechanisms are able to include information of the whole context to each iteration of RNN training process.</text:span></text:p>
            </text:list-item>
            <text:list-item>
              <text:p text:style-name="P7"><text:span text:style-name="T13">For including context, we have to learn the importance of each input on the whole context. </text:span></text:p>
            </text:list-item>
            <text:list-item>
              <text:p text:style-name="P7"><text:span text:style-name="T13">This importance is learned using a bidirectional RNN where the outputs are weigh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11" draw:style-name="gr38" draw:text-style-name="P6" draw:layer="layout" svg:width="21.461cm" svg:height="2.579cm" svg:x="6.2cm" svg:y="0.157cm">
          <text:p text:style-name="P1"><text:span text:style-name="T3">Deep Learning on NLP – RNN and At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0" draw:text-style-name="P9" draw:layer="layout" svg:width="7.937cm" svg:height="10.099cm" svg:x="17.3cm" svg:y="2.683cm">
            <draw:image xlink:href="Pictures/10000000000001FB0000028502A6B491629C498B.png" xlink:type="simple" xlink:show="embed" xlink:actuate="onLoad" draw:mime-type="image/png">
              <text:p/>
            </draw:image>
          </draw:frame>
          <draw:frame draw:style-name="gr39" draw:text-style-name="P17" draw:layer="layout" svg:width="8.333cm" svg:height="1.811cm" svg:x="17.367cm" svg:y="12.782cm">
            <draw:text-box>
              <text:p text:style-name="P10"><text:span text:style-name="T10">Source: Bahdanau, D., Cho, K., and Bengio, Y., “Neural Machine Translation by Jointly Learning to Align and Translate”, arXiv e-prints, 2014.</text:span></text:p>
              <text:p><text:span text:style-name="T10"/></text:p>
            </draw:text-box>
          </draw:frame>
        </draw:g>
        <presentation:notes draw:style-name="dp3">
          <draw:frame draw:name="Google Shape;66;p2:notes_11" presentation:style-name="pr19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12" draw:style-name="gr4" draw:layer="layout" svg:width="14.393cm" svg:height="10.477cm" svg:x="3.599cm" svg:y="2.095cm" draw:page-number="19" presentation:class="page"/>
        </presentation:notes>
      </draw:page>
      <draw:page draw:name="page20" draw:style-name="dp1" draw:master-page-name="BLANK">
        <office:forms form:automatic-focus="false" form:apply-design-mode="false"/>
        <draw:custom-shape draw:name="Google Shape;70;p2_8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9" draw:style-name="gr40" draw:text-style-name="P8" draw:layer="layout" svg:width="20.6cm" svg:height="12.441cm" svg:x="3.2cm" svg:y="2.5cm">
          <text:list text:style-name="L1">
            <text:list-item>
              <text:p text:style-name="P7"><text:span text:style-name="T13">Attention mechanism provided incredible results on NLP.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<text:p text:style-name="P7"><text:span text:style-name="T13"/></text:p>
            </text:list-item>
            <text:list-item>
              <text:p text:style-name="P7"><text:span text:style-name="T13">As you can see, Attention mechanism provides an incredible improvement on RNN scores, but… do we really need RNN? </text:span><text:span text:style-name="T18">Attentions is all you ne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15" draw:style-name="gr41" draw:text-style-name="P6" draw:layer="layout" svg:width="20.061cm" svg:height="2.579cm" svg:x="7.6cm" svg:y="0.157cm">
          <text:p text:style-name="P1"><text:span text:style-name="T3">Deep Learning on NLP – RNN and At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0" draw:text-style-name="P9" draw:layer="layout" svg:width="14.286cm" svg:height="8.502cm" svg:x="7cm" svg:y="3.398cm">
            <draw:image xlink:href="Pictures/10000000000002C5000001A6761E442EC066A45A.png" xlink:type="simple" xlink:show="embed" xlink:actuate="onLoad" draw:mime-type="image/png">
              <text:p/>
            </draw:image>
          </draw:frame>
          <draw:frame draw:style-name="gr42" draw:text-style-name="P15" draw:layer="layout" svg:width="10.058cm" svg:height="1.421cm" svg:x="9.742cm" svg:y="11.481cm">
            <draw:text-box>
              <text:p text:style-name="P10"><text:span text:style-name="T10">Source: Bahdanau, D., Cho, K., and Bengio, Y., “Neural Machine Translation by Jointly Learning to Align and Translate”, arXiv e-prints, 2014.</text:span></text:p>
            </draw:text-box>
          </draw:frame>
        </draw:g>
        <presentation:notes draw:style-name="dp3">
          <draw:frame draw:name="Google Shape;66;p2:notes_8" presentation:style-name="pr20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9" draw:style-name="gr4" draw:layer="layout" svg:width="14.393cm" svg:height="10.477cm" svg:x="3.599cm" svg:y="2.095cm" draw:page-number="20" presentation:class="page"/>
        </presentation:notes>
      </draw:page>
      <draw:page draw:name="page21" draw:style-name="dp1" draw:master-page-name="BLANK">
        <office:forms form:automatic-focus="false" form:apply-design-mode="false"/>
        <draw:custom-shape draw:name="Google Shape;70;p2_21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21" draw:style-name="gr43" draw:text-style-name="P19" draw:layer="layout" svg:width="21.189cm" svg:height="2.535cm" svg:x="3.211cm" svg:y="2.971cm">
          <text:list text:style-name="L1">
            <text:list-item>
              <text:p text:style-name="P18"><text:span text:style-name="T12">Self-attention </text:span><text:span text:style-name="T11">is an attention mechanism for finding relations between different input position data from a single sequence.</text:span><text:span text:style-name="T12"> </text:span></text:p>
            </text:list-item>
            <text:list-item>
              <text:p text:style-name="P18"><text:span text:style-name="T15">Problem</text:span><text:span text:style-name="T11">: no trainable paramet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21" draw:style-name="gr44" draw:text-style-name="P6" draw:layer="layout" svg:width="24.261cm" svg:height="2.579cm" svg:x="3.4cm" svg:y="0.157cm">
          <text:p text:style-name="P1"><text:span text:style-name="T3">Deep Learning on NLP – Attention is all you n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0" draw:text-style-name="P9" draw:layer="layout" svg:width="15.471cm" svg:height="7.655cm" svg:x="6.529cm" svg:y="6.445cm">
            <draw:image xlink:href="Pictures/10000000000005B7000002D4F2B864672D21CEF7.png" xlink:type="simple" xlink:show="embed" xlink:actuate="onLoad" draw:mime-type="image/png">
              <text:p/>
            </draw:image>
          </draw:frame>
          <draw:frame draw:style-name="gr33" draw:text-style-name="P17" draw:layer="layout" svg:width="8.858cm" svg:height="1.031cm" svg:x="9.642cm" svg:y="13.964cm">
            <draw:text-box>
              <text:p><text:span text:style-name="T10">Source: Raschka &amp; Mirjalili 2019. Python Machine Learning, 3rd edition</text:span></text:p>
            </draw:text-box>
          </draw:frame>
        </draw:g>
        <presentation:notes draw:style-name="dp3">
          <draw:frame draw:name="Google Shape;66;p2:notes_21" presentation:style-name="pr2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21" draw:style-name="gr4" draw:layer="layout" svg:width="14.393cm" svg:height="10.477cm" svg:x="3.599cm" svg:y="2.095cm" draw:page-number="21" presentation:class="page"/>
        </presentation:notes>
      </draw:page>
      <draw:page draw:name="page22" draw:style-name="dp1" draw:master-page-name="BLANK">
        <office:forms form:automatic-focus="false" form:apply-design-mode="false"/>
        <draw:custom-shape draw:name="Google Shape;70;p2_22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22" draw:style-name="gr45" draw:text-style-name="P19" draw:layer="layout" svg:width="21.189cm" svg:height="1.775cm" svg:x="3.211cm" svg:y="2.971cm">
          <text:list text:style-name="L1">
            <text:list-item>
              <text:p text:style-name="P18"><text:span text:style-name="T12">Scale dot-product attention </text:span><text:span text:style-name="T11">uses three different matrices called </text:span><text:span text:style-name="T12">query</text:span><text:span text:style-name="T11">, </text:span><text:span text:style-name="T12">key</text:span><text:span text:style-name="T11"> and </text:span><text:span text:style-name="T12">value</text:span><text:span text:style-name="T11">. Those matrices can be train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22" draw:style-name="gr46" draw:text-style-name="P6" draw:layer="layout" svg:width="23.661cm" svg:height="2.579cm" svg:x="4cm" svg:y="0.157cm">
          <text:p text:style-name="P1"><text:span text:style-name="T3">Deep Learning on NLP – Attention is all you n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frame draw:style-name="gr47" draw:text-style-name="P21" draw:layer="layout" svg:width="14.2cm" svg:height="1.103cm" svg:x="9.5cm" svg:y="13.897cm">
              <draw:text-box>
                <text:list text:style-name="L1">
                  <text:list-header>
                    <text:p text:style-name="P20"><text:span text:style-name="T19">Source: </text:span><text:span text:style-name="T10">https://sebastianraschka.com/pdf/lecture-notes/stat453ss21/L19_seq2seq_rnn-transformers__slides.pdf</text:span></text:p>
                  </text:list-header>
                </text:list>
              </draw:text-box>
            </draw:frame>
            <draw:frame draw:style-name="gr10" draw:text-style-name="P9" draw:layer="layout" svg:width="13.343cm" svg:height="8.963cm" svg:x="10.757cm" svg:y="5cm">
              <draw:image xlink:href="Pictures/1000000000000424000002C8AB57256B925855DC.png" xlink:type="simple" xlink:show="embed" xlink:actuate="onLoad" draw:mime-type="image/png">
                <text:p/>
              </draw:image>
            </draw:frame>
          </draw:g>
        </draw:g>
        <draw:g>
          <draw:g>
            <svg:title>TexMaths</svg:title>
            <svg:desc>28§display§\text{query} = W^{q}x_i§svg§600§FALSE§</svg:desc>
            <draw:g>
              <draw:path draw:style-name="gr48" draw:text-style-name="P22" draw:layer="layout" svg:width="4.408cm" svg:height="0.602cm" svg:x="3.613cm" svg:y="7.528cm" svg:viewBox="0 0 4409 603" svg:d="M2206 603c-736 0-1471 0-2206 0 0-201 0-402 0-603 1470 0 2940 0 4409 0 0 201 0 402 0 603-734 0-1469 0-2203 0z">
                <text:p/>
              </draw:path>
              <draw:path draw:style-name="gr49" draw:text-style-name="P23" draw:layer="layout" svg:width="0.36cm" svg:height="0.464cm" svg:x="3.6cm" svg:y="7.694cm" svg:viewBox="0 0 361 465" svg:d="M254 279c0 43 0 87 0 130 0 33-8 33-58 33 0 8 0 15 0 23 25 0 65-2 83-2 19 0 57 2 82 2 0-8 0-15 0-23-48 0-57 0-57-33 0-137 0-273 0-409-5 0-11 0-16 0-9 22-18 44-27 67-11-21-40-67-98-67-86 0-163 71-163 167 0 89 71 164 156 164 52 0 82-31 98-52zM256 121c0 34 0 68 0 102 0 25-14 44-29 63-10 10-33 29-69 29-52 0-98-65-98-148 0-88 53-148 107-148 58 0 89 62 89 102z">
                <text:p/>
              </draw:path>
              <draw:path draw:style-name="gr49" draw:text-style-name="P23" draw:layer="layout" svg:width="0.368cm" svg:height="0.33cm" svg:x="3.986cm" svg:y="7.694cm" svg:viewBox="0 0 369 331" svg:d="M263 265c0 22 0 44 0 66 35-2 71-5 106-8 0-7 0-15 0-23-52 0-58-4-58-39 0-87 0-174 0-261-36 3-71 6-107 8 0 8 0 16 0 23 50 0 57 4 57 40 0 44 0 87 0 131 0 63-36 113-90 113-61 0-65-34-65-73 0-81 0-161 0-242-35 3-71 6-106 8 0 8 0 16 0 23 56 0 56 2 56 67 0 37 0 74 0 110 0 57 0 123 113 123 39 0 73-20 94-66z">
                <text:p/>
              </draw:path>
              <draw:path draw:style-name="gr49" draw:text-style-name="P23" draw:layer="layout" svg:width="0.283cm" svg:height="0.335cm" svg:x="4.39cm" svg:y="7.69cm" svg:viewBox="0 0 284 336" svg:d="M60 144c5-109 67-127 92-127 75 0 81 98 81 127-57 0-115 0-173 0zM60 158c69 0 137 0 205 0 16 0 19 0 19-14 0-73-40-144-132-144-85 0-152 75-152 167 0 98 75 169 161 169 89 0 123-82 123-96 0-6-7-9-11-9-6 0-8 5-10 11-25 75-90 75-98 75-38 0-67-21-84-48-21-35-21-83-21-111z">
                <text:p/>
              </draw:path>
              <draw:path draw:style-name="gr49" draw:text-style-name="P23" draw:layer="layout" svg:width="0.245cm" svg:height="0.322cm" svg:x="4.715cm" svg:y="7.694cm" svg:viewBox="0 0 246 323" svg:d="M102 81c0-27 0-54 0-81-34 3-68 6-102 8 0 8 0 16 0 23 50 0 56 4 56 40 0 65 0 131 0 196 0 33-8 33-56 33 0 8 0 16 0 23 27 0 63-2 83-2 30 0 63 0 92 2 0-7 0-15 0-23-5 0-10 0-14 0-55 0-57-8-57-33 0-38 0-75 0-113 0-73 32-137 88-137 4 0 6 0 8 0-2 2-17 10-17 29 0 21 15 31 32 31 12 0 31-7 31-31s-23-46-54-46c-54 0-82 50-90 81z">
                <text:p/>
              </draw:path>
              <draw:path draw:style-name="gr49" draw:text-style-name="P23" draw:layer="layout" svg:width="0.358cm" svg:height="0.464cm" svg:x="4.995cm" svg:y="7.703cm" svg:viewBox="0 0 359 465" svg:d="M290 69c19-46 56-46 69-46 0-8 0-15 0-23-17 2-38 2-55 2-14 0-48-2-64-2 0 8 0 15 0 23 23 0 35 12 35 31 0 6-2 9-6 17-24 60-49 121-73 181-27-66-54-132-81-198-2-6-5-10-5-12 0-19 28-19 42-19 0-8 0-15 0-23-21 0-69 2-81 2-19 0-48 0-71-2 0 8 0 15 0 23 35 0 50 0 60 25 37 89 73 178 109 267-2 10-13 33-17 44-16 39-37 89-85 89-2 0-19 0-34-12 23-4 30-19 30-32 0-18-15-31-32-31-14 0-31 11-31 31 0 34 31 61 67 61 48 0 77-42 94-83 43-105 86-209 129-313z">
                <text:p/>
              </draw:path>
              <draw:path draw:style-name="gr49" draw:text-style-name="P23" draw:layer="layout" svg:width="0.487cm" svg:height="0.17cm" svg:x="5.612cm" svg:y="7.749cm" svg:viewBox="0 0 488 171" svg:d="M463 29c10 0 25 0 25-14 0-15-15-15-25-15-146 0-292 0-438 0-10 0-25 0-25 15 0 14 15 14 25 14 146 0 292 0 438 0zM463 171c10 0 25 0 25-15 0-14-15-14-25-14-146 0-292 0-438 0-10 0-25 0-25 14 0 15 15 15 25 15 146 0 292 0 438 0z">
                <text:p/>
              </draw:path>
              <draw:path draw:style-name="gr49" draw:text-style-name="P23" draw:layer="layout" svg:width="0.725cm" svg:height="0.514cm" svg:x="6.385cm" svg:y="7.519cm" svg:viewBox="0 0 726 515" svg:d="M630 83c18-31 37-58 83-60 6-2 13-2 13-15 0-4-3-8-9-8-17 0-37 2-56 2-25 0-52-2-75-2-6 0-15 0-15 13 0 8 6 10 11 10 18 0 43 6 43 27 0 8-4 15-10 25-65 115-131 229-196 344-9-121-18-242-27-363-2-14-4-33 50-33 12 0 21 0 21-15 0-8-9-8-13-8-29 0-58 2-89 2-17 0-59-2-75-2-7 0-15 0-15 15 0 8 6 8 17 8 33 0 37 4 39 17 2 18 3 37 4 56-61 108-123 215-185 323-9-124-18-247-27-371 0-8 0-25 56-25 6 0 15 0 15-15 0-8-9-8-11-8-29 0-60 2-89 2-27 0-52-2-77-2-5 0-13 0-13 13 0 10 6 10 17 10 37 0 37 6 39 27 11 149 23 297 34 446 0 13 0 19 10 19s13-4 19-17c71-123 143-247 215-371 9 123 18 246 27 369 2 15 4 19 12 19 9 0 13-8 17-15 80-139 160-278 240-417z">
                <text:p/>
              </draw:path>
              <draw:path draw:style-name="gr49" draw:text-style-name="P23" draw:layer="layout" svg:width="0.228cm" svg:height="0.324cm" svg:x="7.169cm" svg:y="7.49cm" svg:viewBox="0 0 229 325" svg:d="M229 15c0-2 0-5 0-7 0-4-2-8-6-8s-27 19-35 33c-7-10-23-33-57-33-64 0-131 73-131 146 0 50 33 85 77 85 29 0 54-18 65-29 0 2-17 67-19 75-6 29-8 29-40 29-6 0-12 0-12 11 0 4 2 8 6 8 19 0 38-2 54-2 17 0 40 2 55 2 6 0 10-2 10-10 0-9-6-9-13-9-12 0-25 0-25-6 0-2 0-2 3-10 22-92 45-184 68-275zM152 161c-2 10-2 10-10 18-19 23-44 38-63 38s-37-13-37-50c0-27 14-84 27-104 23-40 48-48 62-48 36 0 46 39 46 43 0 5 0 7-2 9-8 31-15 62-23 94z">
                <text:p/>
              </draw:path>
              <draw:path draw:style-name="gr49" draw:text-style-name="P23" draw:layer="layout" svg:width="0.364cm" svg:height="0.33cm" svg:x="7.482cm" svg:y="7.694cm" svg:viewBox="0 0 365 331" svg:d="M223 102c4-19 21-85 73-85 4 0 21 0 38 8-21 4-36 23-36 40 0 12 8 27 27 27 17 0 40-15 40-44 0-38-44-48-69-48-42 0-67 40-75 56-19-48-58-56-79-56-77 0-119 94-119 113 0 8 5 5 8 8 7 0 9-2 11-8 25-78 73-96 98-96 14 0 39 6 39 48 0 23-12 73-39 175-13 44-38 75-69 75-6 0-23 0-38-9 19-4 34-20 34-39 0-21-15-27-27-27-21 0-40 21-40 44 0 33 38 47 69 47 48 0 75-52 77-56 8 27 35 56 79 56 75 0 117-93 117-112 0-8-6-8-8-8-7 0-9 4-11 8-23 79-73 96-96 96-29 0-41-23-41-48 0-17 4-31 12-65 8-33 17-66 25-100z">
                <text:p/>
              </draw:path>
              <draw:path draw:style-name="gr49" draw:text-style-name="P23" draw:layer="layout" svg:width="0.155cm" svg:height="0.343cm" svg:x="7.903cm" svg:y="7.788cm" svg:viewBox="0 0 156 344" svg:d="M142 19c0-9-6-19-19-19-15 0-29 13-29 27 0 11 6 21 21 21 14 0 27-15 27-29zM38 279c-3 7-5 13-5 21 0 25 21 44 48 44 52 0 75-71 75-79 0-6-6-6-8-6-8 0-8 4-10 8-11 42-34 62-55 62-10 0-12-6-12-16 0-13 4-23 8-34 4-14 11-27 17-41 4-13 23-59 25-65 2-4 2-10 2-17 0-23-21-43-48-43-50 0-75 70-75 79 0 6 6 4 8 6 9 0 9-2 11-8 12-44 35-63 54-63 8 0 12 4 12 19 0 10-2 19-14 50-11 28-22 56-33 83z">
                <text:p/>
              </draw:path>
            </draw:g>
          </draw:g>
          <draw:g>
            <svg:title>TexMaths</svg:title>
            <svg:desc>28§display§\text{key} = W^{k}x_i§svg§600§FALSE§</svg:desc>
            <draw:g>
              <draw:path draw:style-name="gr48" draw:text-style-name="P22" draw:layer="layout" svg:width="3.729cm" svg:height="0.729cm" svg:x="4.361cm" svg:y="8.354cm" svg:viewBox="0 0 3730 730" svg:d="M1865 730c-622 0-1243 0-1865 0 0-243 0-487 0-730 1243 0 2487 0 3730 0 0 243 0 487 0 730-622 0-1243 0-1865 0z">
                <text:p/>
              </draw:path>
              <draw:path draw:style-name="gr49" draw:text-style-name="P23" draw:layer="layout" svg:width="0.353cm" svg:height="0.504cm" svg:x="4.345cm" svg:y="8.466cm" svg:viewBox="0 0 354 505" svg:d="M56 449c0 34-6 34-56 34 0 7 0 15 0 22 25 0 58-2 79-2 23 0 52 0 81 2 0-7 0-15 0-22-50 0-56 0-56-34 0-25 0-50 0-75 15-13 31-26 46-39 56 77 88 118 88 131 0 15-13 17-28 17 0 7 0 15 0 22 21 0 65-2 80-2 20 0 43 0 64 2 0-7 0-15 0-22-27 0-44 0-71-38-31-44-62-87-93-131 0-2-5-6-5-8s53-46 59-52c46-38 77-40 94-40 0-7 0-15 0-23-23 2-32 2-53 2-27 0-70-2-81-2 0 8 0 16 0 23 13 0 21 9 21 19 0 15-10 23-17 27-34 30-68 60-102 89 0-116 0-233 0-349-35 3-71 6-106 8 0 8 0 16 0 23 52 0 56 4 56 40 0 126 0 252 0 378z">
                <text:p/>
              </draw:path>
              <draw:path draw:style-name="gr49" draw:text-style-name="P23" draw:layer="layout" svg:width="0.282cm" svg:height="0.334cm" svg:x="4.711cm" svg:y="8.645cm" svg:viewBox="0 0 283 335" svg:d="M60 144c5-109 67-127 92-127 75 0 81 97 81 127-57 0-115 0-173 0zM60 158c68 0 137 0 205 0 16 0 18 0 18-14 0-73-39-144-131-144-85 0-152 75-152 166 0 98 77 169 160 169 90 0 123-81 123-96 0-6-6-8-10-8-6 0-8 4-10 10-25 75-90 75-98 75-38 0-67-21-84-48-21-35-21-83-21-110z">
                <text:p/>
              </draw:path>
              <draw:path draw:style-name="gr49" draw:text-style-name="P23" draw:layer="layout" svg:width="0.355cm" svg:height="0.463cm" svg:x="5.03cm" svg:y="8.658cm" svg:viewBox="0 0 356 464" svg:d="M290 69c18-46 56-46 66-46 0-8 0-15 0-23-16 2-37 2-54 2-12 0-48-2-64-2 0 8 0 15 0 23 22 0 35 12 35 31 0 6 0 8-4 17-25 60-50 120-75 181-27-66-54-132-81-198-3-6-5-10-5-12 0-19 27-19 42-19 0-8 0-15 0-23-19 0-67 2-79 2-21 0-50 0-71-2 0 8 0 15 0 23 33 0 48 0 58 25 37 89 74 177 111 266-4 11-15 33-19 44-17 39-37 89-83 89-4 0-21 0-36-12 23-4 29-19 29-31 0-19-14-32-31-32-14 0-29 11-29 32 0 33 29 60 67 60 46 0 75-42 93-83 44-104 87-208 130-312z">
                <text:p/>
              </draw:path>
              <draw:path draw:style-name="gr49" draw:text-style-name="P23" draw:layer="layout" svg:width="0.485cm" svg:height="0.17cm" svg:x="5.647cm" svg:y="8.703cm" svg:viewBox="0 0 486 171" svg:d="M461 29c10 0 25 0 25-14 0-15-15-15-23-15-147 0-294 0-440 0-10 0-23 0-23 15 0 14 13 14 25 14 145 0 290 0 436 0zM463 171c8 0 23 0 23-15s-15-15-25-15c-146 0-291 0-436 0-12 0-25 0-25 15s13 15 23 15c146 0 293 0 440 0z">
                <text:p/>
              </draw:path>
              <draw:path draw:style-name="gr49" draw:text-style-name="P23" draw:layer="layout" svg:width="0.726cm" svg:height="0.513cm" svg:x="6.418cm" svg:y="8.475cm" svg:viewBox="0 0 727 514" svg:d="M631 83c19-31 36-58 82-60 6-2 14-2 14-15 0-4-4-8-8-8-19 0-40 2-58 2-23 0-50-2-75-2-5 0-15 0-15 12 0 9 6 11 12 11 17 0 42 6 42 27 0 8-2 14-8 25-66 114-132 229-198 343-9-121-18-241-27-362 0-14-2-33 50-33 12 0 21 0 21-15 0-8-9-8-11-8-29 0-60 2-89 2-17 0-61-2-78-2-4 0-14 0-14 15 0 8 8 8 19 8 31 0 37 4 37 17 2 18 3 37 4 56-61 107-122 215-183 322-10-123-20-247-29-370 0-8 0-25 56-25 6 0 15 0 15-15 0-8-9-8-11-8-29 0-58 2-89 2-25 0-52-2-77-2-3 0-13 0-13 12 0 11 6 11 19 11 35 0 37 6 37 27 11 148 22 297 34 445 2 13 2 19 12 19 8 0 11-4 17-17 71-123 143-247 214-370 9 123 18 245 27 368 3 15 5 19 13 19 10 0 15-9 19-15 80-138 159-277 239-416z">
                <text:p/>
              </draw:path>
              <draw:path draw:style-name="gr49" draw:text-style-name="P23" draw:layer="layout" svg:width="0.251cm" svg:height="0.359cm" svg:x="7.21cm" svg:y="8.316cm" svg:viewBox="0 0 252 360" svg:d="M121 17c0-2 1-6 2-9 0-4-2-8-8-8-11 0-52 4-65 6-4 0-12 0-12 11 0 8 8 8 14 8 23 0 23 2 23 6s0 9-2 13c-24 96-47 192-71 289-2 8-2 8-2 10 0 9 6 17 17 17 14 0 21-11 23-21 2-2 23-94 25-100 37 4 66 15 66 42 0 2 0 6-2 10-2 9-2 11-2 17 0 35 31 52 54 52 50 0 67-77 67-79 0-6-6-4-8-6-9 0-9 2-11 12-6 23-21 58-46 58-14 0-16-12-16-27 0-8 0-8 2-23 0-2 2-10 2-14 0-46-61-54-83-54 16-11 35-27 43-36 25-23 52-47 79-47 7 0 15 2 19 6-23 4-27 21-27 29 0 10 8 19 21 19 12 0 29-11 29-34 0-16-12-35-39-35-30 0-57 21-84 46-21 21-37 35-58 43 17-67 33-134 50-201z">
                <text:p/>
              </draw:path>
              <draw:path draw:style-name="gr49" draw:text-style-name="P23" draw:layer="layout" svg:width="0.364cm" svg:height="0.33cm" svg:x="7.551cm" svg:y="8.649cm" svg:viewBox="0 0 365 331" svg:d="M223 102c4-19 21-85 73-85 4 0 21 0 37 8-20 4-35 23-35 39 0 13 8 28 27 28 17 0 40-15 40-44 0-38-44-48-69-48-42 0-67 40-75 56-19-48-58-56-79-56-77 0-119 94-119 112 0 9 5 6 8 9 7 0 9-2 11-9 25-77 73-95 98-95 14 0 39 6 39 47 0 23-12 73-39 175-13 44-38 75-69 75-6 0-23 0-38-8 19-4 34-21 34-40 0-21-15-27-27-27-21 0-40 21-40 44 0 33 38 48 69 48 48 0 75-52 77-56 8 27 35 56 79 56 75 0 117-94 117-113 0-8-7-8-9-8-6 0-8 4-10 8-23 79-73 96-96 96-29 0-42-23-42-48 0-16 5-31 13-64 8-34 17-67 25-100z">
                <text:p/>
              </draw:path>
              <draw:path draw:style-name="gr49" draw:text-style-name="P23" draw:layer="layout" svg:width="0.155cm" svg:height="0.342cm" svg:x="7.972cm" svg:y="8.743cm" svg:viewBox="0 0 156 343" svg:d="M142 19c0-9-7-19-19-19-15 0-29 12-29 27 0 10 6 21 21 21 14 0 27-15 27-29zM38 279c-3 6-5 12-5 21 0 25 21 43 48 43 52 0 75-70 75-79 0-6-6-6-8-6-8 0-8 4-10 8-11 42-34 63-55 63-10 0-12-7-12-17 0-12 4-23 8-33 4-15 11-27 17-42 4-12 23-58 25-64 2-5 2-11 2-17 0-23-21-44-48-44-50 0-75 71-75 79 0 7 6 5 8 7 9 0 9-2 11-9 12-43 35-62 54-62 8 0 12 4 12 19 0 10-2 18-14 50-11 27-22 55-33 83z">
                <text:p/>
              </draw:path>
            </draw:g>
          </draw:g>
          <draw:g>
            <svg:title>TexMaths</svg:title>
            <svg:desc>28§display§\text{value} = W^{v}x_i§svg§600§FALSE§</svg:desc>
            <draw:g>
              <draw:path draw:style-name="gr48" draw:text-style-name="P22" draw:layer="layout" svg:width="4.288cm" svg:height="0.565cm" svg:x="3.773cm" svg:y="9.397cm" svg:viewBox="0 0 4289 566" svg:d="M2144 566c-714 0-1429 0-2144 0 0-189 0-377 0-566 1430 0 2859 0 4289 0 0 189 0 377 0 566-715 0-1430 0-2145 0z">
                <text:p/>
              </draw:path>
              <draw:path draw:style-name="gr49" draw:text-style-name="P23" draw:layer="layout" svg:width="0.357cm" svg:height="0.321cm" svg:x="3.75cm" svg:y="9.572cm" svg:viewBox="0 0 358 322" svg:d="M290 71c8-17 21-48 68-48 0-8 0-15 0-23-16 2-39 2-56 2s-50-2-62-2c0 8 0 15 0 23 27 0 35 17 35 31 0 6-2 10-4 17-25 62-50 124-75 187-28-68-56-136-83-204-5-10-5-10-5-12 0-19 30-19 42-19 0-8 0-15 0-23-21 0-62 2-79 2-21 0-50 0-71-2 0 8 0 15 0 23 46 0 48 4 58 27 36 86 71 172 107 258 4 10 4 14 14 14 11 0 13-6 15-14 32-79 64-158 96-237z">
                <text:p/>
              </draw:path>
              <draw:path draw:style-name="gr49" draw:text-style-name="P23" draw:layer="layout" svg:width="0.328cm" svg:height="0.334cm" svg:x="4.112cm" svg:y="9.559cm" svg:viewBox="0 0 329 335" svg:d="M213 270c4 29 22 61 58 61 14 0 58-11 58-69 0-14 0-28 0-42-5 0-11 0-16 0 0 14 0 28 0 42 0 42-19 46-28 46-25 0-27-33-27-36 0-48 0-97 0-145 0-31 0-60-27-87-27-28-64-40-100-40-60 0-110 35-110 83 0 21 14 33 33 33 21 0 34-14 34-33 0-8-3-33-36-33 19-25 54-33 77-33 38 0 79 27 79 93 0 9 0 18 0 27-37 2-89 4-135 25-54 25-73 63-73 96 0 58 71 77 117 77 48 0 81-29 96-65zM208 152c0 24 0 48 0 73 0 68-54 93-85 93-38 0-67-25-67-62 0-40 32-100 152-104z">
                <text:p/>
              </draw:path>
              <draw:path draw:style-name="gr49" draw:text-style-name="P23" draw:layer="layout" svg:width="0.162cm" svg:height="0.504cm" svg:x="4.471cm" svg:y="9.38cm" svg:viewBox="0 0 163 505" svg:d="M106 0c-35 3-71 6-106 8 0 8 0 16 0 23 52 0 58 4 58 40 0 126 0 252 0 378 0 33-8 33-58 33 0 8 0 16 0 23 25 0 64-2 81-2 18 0 54 2 82 2 0-7 0-15 0-23-48 0-57 0-57-33 0-150 0-299 0-449z">
                <text:p/>
              </draw:path>
              <draw:path draw:style-name="gr49" draw:text-style-name="P23" draw:layer="layout" svg:width="0.366cm" svg:height="0.33cm" svg:x="4.675cm" svg:y="9.563cm" svg:viewBox="0 0 367 331" svg:d="M263 264c0 22 0 44 0 67 34-3 69-6 104-9 0-7 0-15 0-23-50 0-56-4-56-41 0-86 0-172 0-258-37 3-73 6-109 8 0 8 0 16 0 23 52 0 58 4 58 42 0 43 0 86 0 129 0 62-35 112-89 112-61 0-65-33-65-73 0-80 0-161 0-241-35 3-71 6-106 8 0 8 0 16 0 23 56 0 56 2 56 67 0 36 0 73 0 110 0 56 0 123 111 123 41 0 75-21 96-67z">
                <text:p/>
              </draw:path>
              <draw:path draw:style-name="gr49" draw:text-style-name="P23" draw:layer="layout" svg:width="0.282cm" svg:height="0.334cm" svg:x="5.077cm" svg:y="9.559cm" svg:viewBox="0 0 283 335" svg:d="M63 143c4-108 66-126 91-126 75 0 81 97 81 126-57 0-115 0-172 0zM63 158c68 0 136 0 204 0 14 0 16 0 16-15 0-72-39-143-129-143-85 0-154 75-154 166 0 98 77 169 163 169 89 0 120-81 120-96 0-6-4-8-8-8-6 0-8 4-10 10-25 75-92 75-98 75-38 0-67-21-84-48-20-35-20-83-20-110z">
                <text:p/>
              </draw:path>
              <draw:path draw:style-name="gr49" draw:text-style-name="P23" draw:layer="layout" svg:width="0.487cm" svg:height="0.17cm" svg:x="5.627cm" svg:y="9.617cm" svg:viewBox="0 0 488 171" svg:d="M463 29c10 0 25 0 25-14 0-15-15-15-25-15-146 0-292 0-438 0-10 0-25 0-25 15 0 14 15 14 25 14 146 0 292 0 438 0zM463 171c10 0 25 0 25-15s-15-15-25-15c-146 0-292 0-438 0-10 0-25 0-25 15s15 15 25 15c146 0 292 0 438 0z">
                <text:p/>
              </draw:path>
              <draw:path draw:style-name="gr49" draw:text-style-name="P23" draw:layer="layout" svg:width="0.726cm" svg:height="0.513cm" svg:x="6.4cm" svg:y="9.389cm" svg:viewBox="0 0 727 514" svg:d="M629 85c19-33 38-58 84-62 6-2 14-2 14-15 0-4-4-8-10-8-17 0-38 2-56 2-25 0-52-2-75-2-5 0-15 0-15 15 0 6 6 8 10 8 19 0 44 6 44 27 0 8-4 14-10 25-66 114-131 229-196 343-9-121-18-241-27-362-2-14-2-33 50-33 12 0 21 0 21-15 0-8-9-8-13-8-29 0-58 2-87 2-19 0-61-2-78-2-4 0-14 0-14 15 0 8 6 8 17 8 33 0 37 4 39 19 2 18 3 36 4 54-61 107-123 215-185 322-9-123-18-247-27-370 0-8 0-25 56-25 6 0 15 0 15-15 0-8-9-8-11-8-29 0-60 2-89 2-25 0-52-2-77-2-5 0-13 0-13 15 0 8 6 8 17 8 37 0 37 6 39 27 11 148 22 295 34 443 0 14 2 21 10 21 10 0 13-7 19-17 71-123 143-247 214-370 9 122 18 244 28 366 2 16 4 21 12 21s13-9 17-15c80-138 159-276 239-414z">
                <text:p/>
              </draw:path>
              <draw:path draw:style-name="gr49" draw:text-style-name="P23" draw:layer="layout" svg:width="0.249cm" svg:height="0.23cm" svg:x="7.176cm" svg:y="9.36cm" svg:viewBox="0 0 250 231" svg:d="M250 42c0-42-23-42-25-42-12 0-27 15-27 27 0 8 4 13 8 17 9 6 19 20 19 39 0 23-33 133-96 133-39 0-39-37-39-45 0-23 8-52 27-100 4-11 8-17 8-27 0-25-23-44-50-44-50 0-75 71-75 79 0 6 8 6 10 6 7 0 7-2 9-8 12-42 35-62 54-62 10 0 15 6 15 18 0 11-5 23-11 34-21 56-27 79-27 97 0 50 40 67 79 67 86 0 121-148 121-189z">
                <text:p/>
              </draw:path>
              <draw:path draw:style-name="gr49" draw:text-style-name="P23" draw:layer="layout" svg:width="0.364cm" svg:height="0.33cm" svg:x="7.522cm" svg:y="9.563cm" svg:viewBox="0 0 365 331" svg:d="M223 102c4-19 21-85 73-85 4 0 21 0 37 8-20 4-35 23-35 39 0 13 8 28 27 28 17 0 40-15 40-44 0-38-44-48-69-48-42 0-67 40-77 56-17-48-56-56-77-56-77 0-119 94-119 112 0 9 6 9 8 9 7 0 9-2 11-9 25-77 73-95 98-95 12 0 39 6 39 47 0 23-12 73-39 175-13 44-38 75-71 75-4 0-21 0-36-10 19-2 34-19 34-38 0-21-15-27-27-27-21 0-40 19-40 44 0 33 38 48 69 48 48 0 75-52 77-56 8 27 35 56 79 56 75 0 117-94 117-113 0-8-6-8-9-8-6 0-8 4-10 8-23 79-73 96-96 96-29 0-42-23-42-48 0-16 5-31 13-64 8-34 17-67 25-100z">
                <text:p/>
              </draw:path>
              <draw:path draw:style-name="gr49" draw:text-style-name="P23" draw:layer="layout" svg:width="0.155cm" svg:height="0.342cm" svg:x="7.943cm" svg:y="9.657cm" svg:viewBox="0 0 156 343" svg:d="M142 19c0-9-7-19-19-19-15 0-29 12-29 27 0 10 6 21 21 21 14 0 27-15 27-29zM38 279c-3 6-5 12-5 20 0 25 21 44 48 44 52 0 75-71 75-79 0-6-6-6-8-6-8 0-8 4-10 8-11 42-34 63-55 63-10 0-12-7-12-19 0-11 4-21 8-31 4-15 11-29 17-42 4-12 23-58 25-64 2-5 2-11 2-17 0-23-21-44-48-44-50 0-75 71-75 79 0 7 6 4 8 7 9 0 9-3 11-9 12-43 35-62 54-62 8 0 12 4 12 19 0 10-2 18-14 49-11 28-22 56-33 84z">
                <text:p/>
              </draw:path>
            </draw:g>
          </draw:g>
        </draw:g>
        <presentation:notes draw:style-name="dp3">
          <draw:frame draw:name="Google Shape;66;p2:notes_22" presentation:style-name="pr2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22" draw:style-name="gr4" draw:layer="layout" svg:width="14.393cm" svg:height="10.477cm" svg:x="3.599cm" svg:y="2.095cm" draw:page-number="22" presentation:class="page"/>
        </presentation:notes>
      </draw:page>
      <draw:page draw:name="page23" draw:style-name="dp1" draw:master-page-name="BLANK">
        <office:forms form:automatic-focus="false" form:apply-design-mode="false"/>
        <draw:custom-shape draw:name="Google Shape;70;p2_20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20" draw:style-name="gr50" draw:text-style-name="P8" draw:layer="layout" svg:width="12.2cm" svg:height="6.345cm" svg:x="13.8cm" svg:y="5.471cm">
          <text:list text:style-name="L1">
            <text:list-item>
              <text:p text:style-name="P7"><text:span text:style-name="T12">Transformers </text:span><text:span text:style-name="T11">are an architecture that use multi-head attention systems</text:span></text:p>
            </text:list-item>
            <text:list-item>
              <text:p text:style-name="P7"><text:span text:style-name="T11">Includes multiple layers of encoders and decoder.</text:span></text:p>
            </text:list-item>
            <text:list-item>
              <text:p text:style-name="P7"><text:span text:style-name="T11">A positional encoder is included in order to maintain information about posi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20" draw:style-name="gr51" draw:text-style-name="P6" draw:layer="layout" svg:width="23.861cm" svg:height="2.579cm" svg:x="3.8cm" svg:y="0.157cm">
          <text:p text:style-name="P1"><text:span text:style-name="T3">Deep Learning on NLP – Attention is all you n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9cm" svg:height="12.065cm" svg:x="2.6cm" svg:y="2.6cm">
          <draw:image xlink:href="Pictures/100000000000025D0000032B54A5641F251B60A2.png" xlink:type="simple" xlink:show="embed" xlink:actuate="onLoad" draw:mime-type="image/png">
            <text:p/>
          </draw:image>
        </draw:frame>
        <draw:frame draw:style-name="gr33" draw:text-style-name="P24" draw:layer="layout" svg:width="8.656cm" svg:height="1.031cm" svg:x="2.544cm" svg:y="14.5cm">
          <draw:text-box>
            <text:p><text:span text:style-name="T10">Source: Vaswani, A., “Attention Is All You Need”, arXiv e-prints, 2017.</text:span></text:p>
          </draw:text-box>
        </draw:frame>
        <presentation:notes draw:style-name="dp3">
          <draw:frame draw:name="Google Shape;66;p2:notes_20" presentation:style-name="pr2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20" draw:style-name="gr4" draw:layer="layout" svg:width="14.393cm" svg:height="10.477cm" svg:x="3.599cm" svg:y="2.095cm" draw:page-number="23" presentation:class="page"/>
        </presentation:notes>
      </draw:page>
      <draw:page draw:name="page24" draw:style-name="dp1" draw:master-page-name="BLANK">
        <office:forms form:automatic-focus="false" form:apply-design-mode="false"/>
        <draw:custom-shape draw:name="Google Shape;70;p2_14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15" draw:style-name="gr52" draw:text-style-name="P8" draw:layer="layout" svg:width="21.189cm" svg:height="3.452cm" svg:x="3.4cm" svg:y="3.783cm">
          <text:list text:style-name="L1">
            <text:list-item>
              <text:p text:style-name="P7"><text:span text:style-name="T20">Github copilot: </text:span><text:span text:style-name="T20"><text:a xlink:href="https://copilot.github.com/" xlink:type="simple">https://copilot.github.com/</text:a></text:span></text:p>
            </text:list-item>
            <text:list-item>
              <text:p text:style-name="P7"><text:span text:style-name="T20">Compose.ai (writing extension): </text:span><text:span text:style-name="T20"><text:a xlink:href="https://www.compose.ai/" xlink:type="simple">https://www.compose.ai/</text:a></text:span></text:p>
            </text:list-item>
            <text:list-item>
              <text:p text:style-name="P7"><text:span text:style-name="T20">Playground: </text:span><text:span text:style-name="T20"><text:a xlink:href="https://beta.openai.com/playground/" xlink:type="simple">https://beta.openai.com/playground/</text:a></text:span></text:p>
            </text:list-item>
            <text:list-item>
              <text:p text:style-name="P7"><text:span text:style-name="T20">Etc...</text:span></text:p>
              <text:p text:style-name="P7"><text:span text:style-name="T2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_14" draw:style-name="gr41" draw:text-style-name="P6" draw:layer="layout" svg:width="20.061cm" svg:height="2.579cm" svg:x="7.6cm" svg:y="0.157cm">
          <text:p text:style-name="P1"><text:span text:style-name="T3">Deep Learning on NLP –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5.594cm" svg:height="7cm" svg:x="6.6cm" svg:y="7.104cm">
          <draw:image xlink:href="Pictures/10000000000007580000034CE94C7395B2D58CA4.png" xlink:type="simple" xlink:show="embed" xlink:actuate="onLoad" draw:mime-type="image/png">
            <text:p/>
          </draw:image>
        </draw:frame>
        <presentation:notes draw:style-name="dp3">
          <draw:frame draw:name="Google Shape;66;p2:notes_14" presentation:style-name="pr2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15" draw:style-name="gr4" draw:layer="layout" svg:width="14.393cm" svg:height="10.477cm" svg:x="3.599cm" svg:y="2.095cm" draw:page-number="24" presentation:class="page"/>
        </presentation:notes>
      </draw:page>
      <draw:page draw:name="page25" draw:style-name="dp1" draw:master-page-name="BLANK">
        <office:forms form:automatic-focus="false" form:apply-design-mode="false"/>
        <draw:custom-shape draw:name="Google Shape;188;p13" draw:style-name="gr9" draw:text-style-name="P6" draw:layer="layout" svg:width="22.707cm" svg:height="1.942cm" svg:x="2.753cm" svg:y="6.336cm">
          <text:p text:style-name="P1"><text:span text:style-name="T21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3" draw:style-name="gr3" draw:text-style-name="P3" draw:layer="layout" svg:width="20.869cm" svg:height="0.001cm" svg:x="3.854cm" svg:y="3.9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13" draw:style-name="gr3" draw:text-style-name="P3" draw:layer="layout" svg:width="20.869cm" svg:height="0.001cm" svg:x="3.854cm" svg:y="11.01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frame draw:name="Google Shape;185;p13:notes" presentation:style-name="pr2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86;p13:notes" draw:style-name="gr4" draw:layer="layout" svg:width="14.393cm" svg:height="10.477cm" svg:x="3.599cm" svg:y="2.095cm" draw:page-number="25" presentation:class="page"/>
        </presentation:notes>
      </draw:page>
      <draw:page draw:name="page26" draw:style-name="dp1" draw:master-page-name="BLANK">
        <office:forms form:automatic-focus="false" form:apply-design-mode="false"/>
        <draw:custom-shape draw:name="Google Shape;69;p2_2" draw:style-name="gr53" draw:text-style-name="P6" draw:layer="layout" svg:width="6.261cm" svg:height="2.579cm" svg:x="21.3cm" svg:y="0.157cm">
          <text:p text:style-name="P1"><text:span text:style-name="T3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2_3" draw:style-name="gr8" draw:text-style-name="P3" draw:layer="layout" svg:width="25.025cm" svg:height="0.001cm" svg:x="2.972cm" svg:y="2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3_3" draw:style-name="gr9" draw:text-style-name="P14" draw:layer="layout" svg:width="21.189cm" svg:height="9.569cm" svg:x="3.211cm" svg:y="3.671cm">
          <text:list text:style-name="L1">
            <text:list-item>
              <text:p text:style-name="P13"><text:span text:style-name="T22">Aurélien Géron, “Hands on Machine Learning with Scikit-Learn, Keras &amp; TensorFlow”</text:span></text:p>
            </text:list-item>
            <text:list-item>
              <text:p text:style-name="P13"><text:span text:style-name="T22">https://nogood.io/2021/06/25/gpt-3-tools/</text:span></text:p>
            </text:list-item>
            <text:list-item>
              <text:p text:style-name="P13"><text:span text:style-name="T22">Vaswani, A., “Attention Is All You Need”, arXiv e-prints, 2017.</text:span></text:p>
            </text:list-item>
            <text:list-item>
              <text:p text:style-name="P13"><text:span text:style-name="T22">Bahdanau, D., Cho, K., and Bengio, Y., “Neural Machine Translation by Jointly Learning to Align and Translate”, arXiv e-prints, 2014.</text:span></text:p>
            </text:list-item>
            <text:list-item>
              <text:p text:style-name="P13"><text:span text:style-name="T22"><text:a xlink:href="https://towardsdatascience.com/word-embedding-in-nlp-one-hot-encoding-and-skip-gram-neural-network-81b424da58f2" xlink:type="simple">https://towardsdatascience.com/word-embedding-in-nlp-one-hot-encoding-and-skip-gram-neural-network-81b424da58f2</text:a></text:span></text:p>
            </text:list-item>
            <text:list-item>
              <text:p text:style-name="P13"><text:span text:style-name="T22"><text:a xlink:href="https://medium.com/analytics-vidhya/natural-language-processing-from-basics-to-using-rnn-and-lstm-ef6779e4ae66" xlink:type="simple">https://medium.com/analytics-vidhya/natural-language-processing-from-basics-to-using-rnn-and-lstm-ef6779e4ae66</text:a></text:span></text:p>
            </text:list-item>
            <text:list-item>
              <text:p text:style-name="P13"><text:span text:style-name="T22"><text:a xlink:href="https://purnasaigudikandula.medium.com/recurrent-neural-networks-and-lstm-explained-7f51c7f6bbb9" xlink:type="simple">https://purnasaigudikandula.medium.com/recurrent-neural-networks-and-lstm-explained-7f51c7f6bbb9</text:a></text:span></text:p>
            </text:list-item>
            <text:list-item>
              <text:p text:style-name="P13"><text:span text:style-name="T22"><text:a xlink:href="https://sebastianraschka.com/pdf/lecture-notes/stat453ss21/L19_seq2seq_rnn-transformers__slides.pdf" xlink:type="simple">https://sebastianraschka.com/pdf/lecture-notes/stat453ss21/L19_seq2seq_rnn-transformers__slides.pdf</text:a></text:span></text:p>
              <text:p text:style-name="P13"><text:span text:style-name="T22"/></text:p>
            </text:list-item>
          </text:list>
          <text:p text:style-name="P13"><text:span text:style-name="T23"/></text:p>
          <text:p text:style-name="P13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66;p2:notes_2" presentation:style-name="pr2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_3" draw:style-name="gr4" draw:layer="layout" svg:width="14.393cm" svg:height="10.477cm" svg:x="3.599cm" svg:y="2.095cm" draw:page-number="2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Calibri3" svg:font-family="Calibri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6-21T01:10:02</meta:creation-date>
    <meta:initial-creator>Usuario de Windows</meta:initial-creator>
    <meta:generator>LibreOffice/7.3.7.2$Linux_X86_64 LibreOffice_project/30$Build-2</meta:generator>
    <dc:date>2023-10-20T03:09:09.986012448</dc:date>
    <meta:editing-duration>PT8H24M28S</meta:editing-duration>
    <meta:editing-cycles>110</meta:editing-cycles>
    <meta:document-statistic meta:object-count="2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